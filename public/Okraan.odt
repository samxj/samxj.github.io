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, 'Bitstream Charter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nionPro-Regular" svg:font-family="MinionPro-Regular" style:font-family-generic="roman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568cm" fo:margin-left="-0.106cm" fo:margin-top="0cm" fo:margin-bottom="0cm" table:align="left"/>
    </style:style>
    <style:style style:name="Table1.A" style:family="table-column">
      <style:table-column-properties style:column-width="2.311cm"/>
    </style:style>
    <style:style style:name="Table1.B" style:family="table-column">
      <style:table-column-properties style:column-width="2.258cm"/>
    </style:style>
    <style:style style:name="Table1.1" style:family="table-row">
      <style:table-row-properties style:min-row-height="0.61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9" style:family="table-row">
      <style:table-row-properties style:min-row-height="0.452cm" fo:keep-together="auto"/>
    </style:style>
    <style:style style:name="P1" style:family="paragraph" style:parent-style-name="Standard">
      <style:text-properties fo:font-size="20pt" fo:font-weight="bold" officeooo:rsid="0012d1a4" officeooo:paragraph-rsid="0012d1a4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22ad17" officeooo:paragraph-rsid="0022ad17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style="normal" fo:font-weight="bold" officeooo:rsid="0018b875" officeooo:paragraph-rsid="0018b875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fo:font-weight="bold" officeooo:rsid="001b14fe" officeooo:paragraph-rsid="001b14fe" style:font-size-asian="17.5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style="normal" fo:font-weight="bold" officeooo:rsid="001d845f" officeooo:paragraph-rsid="001d845f" style:font-size-asian="17.5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style="normal" fo:font-weight="bold" officeooo:rsid="001d845f" officeooo:paragraph-rsid="002d88be" style:font-size-asian="17.5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style="normal" fo:font-weight="bold" officeooo:rsid="001d845f" officeooo:paragraph-rsid="002f9fe4" style:font-size-asian="17.5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style="normal" fo:font-weight="bold" officeooo:rsid="001d845f" officeooo:paragraph-rsid="00352e90" style:font-size-asian="17.5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style="normal" fo:font-weight="normal" officeooo:rsid="00241264" officeooo:paragraph-rsid="00241264" style:font-size-asian="17.5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1611c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fo:font-weight="bold" officeooo:rsid="0013286c" officeooo:paragraph-rsid="0013286c" fo:background-color="#729fcf" style:font-size-asian="14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fo:font-weight="normal" officeooo:rsid="0012d1a4" officeooo:paragraph-rsid="0012d1a4" fo:background-color="#729fcf" style:font-size-asian="14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text-properties fo:font-size="16pt" fo:font-weight="normal" officeooo:rsid="0012d1a4" officeooo:paragraph-rsid="001611ca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fo:font-weight="normal" officeooo:rsid="00432b57" officeooo:paragraph-rsid="00432b57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style="normal" fo:font-weight="normal" officeooo:rsid="00432b57" officeooo:paragraph-rsid="00449cfc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style="normal" fo:font-weight="normal" officeooo:rsid="00432b57" officeooo:paragraph-rsid="005351c9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fo:font-weight="normal" officeooo:rsid="00442511" officeooo:paragraph-rsid="005351c9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text-properties fo:font-size="15pt" fo:font-weight="normal" officeooo:rsid="0012d1a4" officeooo:paragraph-rsid="0012d1a4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fo:font-weight="normal" officeooo:rsid="001611ca" officeooo:paragraph-rsid="001611ca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5pt" fo:font-weight="normal" officeooo:rsid="0034528e" officeooo:paragraph-rsid="0034528e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normal" officeooo:rsid="00495fd1" officeooo:paragraph-rsid="00495fd1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5pt" fo:font-weight="normal" officeooo:paragraph-rsid="0034528e"/>
    </style:style>
    <style:style style:name="P23" style:family="paragraph" style:parent-style-name="Standard">
      <style:text-properties fo:font-size="15pt" fo:font-weight="normal" officeooo:paragraph-rsid="001611ca"/>
    </style:style>
    <style:style style:name="P24" style:family="paragraph" style:parent-style-name="Standard">
      <style:text-properties fo:font-size="18pt" fo:font-weight="bold" officeooo:rsid="0012d1a4" officeooo:paragraph-rsid="0012d1a4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24pt" fo:font-weight="bold" officeooo:rsid="0012d1a4" officeooo:paragraph-rsid="0012d1a4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2d1a4" officeooo:paragraph-rsid="0012d1a4" fo:background-color="#729fc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style="italic" fo:font-weight="bold" officeooo:rsid="0012d1a4" officeooo:paragraph-rsid="0012d1a4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style="italic" fo:font-weight="normal" officeooo:rsid="0012d1a4" officeooo:paragraph-rsid="0012d1a4" fo:background-color="#729fcf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italic" fo:font-weight="normal" officeooo:rsid="0012d1a4" officeooo:paragraph-rsid="0012d1a4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italic" fo:font-weight="normal" officeooo:rsid="002f7b7c" officeooo:paragraph-rsid="002f7b7c" style:font-size-asian="12.25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italic" fo:font-weight="normal" officeooo:rsid="002f7b7c" officeooo:paragraph-rsid="002f9fe4" style:font-size-asian="12.25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italic" fo:font-weight="normal" officeooo:rsid="002f9fe4" officeooo:paragraph-rsid="002f9fe4" style:font-size-asian="12.25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normal" fo:font-weight="bold" officeooo:rsid="0013286c" officeooo:paragraph-rsid="0013286c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style="normal" fo:font-weight="bold" officeooo:rsid="0013286c" officeooo:paragraph-rsid="0013dd00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style="normal" fo:font-weight="bold" officeooo:rsid="0013286c" officeooo:paragraph-rsid="001e1a41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style="normal" fo:font-weight="bold" officeooo:rsid="001611ca" officeooo:paragraph-rsid="001626ce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style="normal" fo:font-weight="bold" officeooo:rsid="001611ca" officeooo:paragraph-rsid="001611ca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style="normal" fo:font-weight="bold" officeooo:rsid="001611ca" officeooo:paragraph-rsid="0018b875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style="normal" fo:font-weight="bold" officeooo:rsid="0014780d" officeooo:paragraph-rsid="0014780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fo:font-weight="bold" officeooo:rsid="0018b875" officeooo:paragraph-rsid="0018b875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font-style="normal" fo:font-weight="bold" officeooo:rsid="001cf94b" officeooo:paragraph-rsid="001cf94b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font-style="normal" fo:font-weight="bold" officeooo:rsid="001d845f" officeooo:paragraph-rsid="001d845f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style="normal" fo:font-weight="bold" officeooo:rsid="001e1a41" officeooo:paragraph-rsid="001e1a41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font-style="normal" fo:font-weight="bold" officeooo:rsid="001ff4c9" officeooo:paragraph-rsid="001ff4c9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style="normal" fo:font-weight="bold" officeooo:rsid="0024d617" officeooo:paragraph-rsid="0024d617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fo:font-weight="bold" officeooo:rsid="0025e5b4" officeooo:paragraph-rsid="0025e5b4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font-style="normal" fo:font-weight="bold" officeooo:rsid="0032f559" officeooo:paragraph-rsid="0032f559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fo:font-style="normal" fo:font-weight="bold" officeooo:rsid="00407028" officeooo:paragraph-rsid="00407028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4pt" fo:font-style="normal" fo:font-weight="bold" officeooo:rsid="00241264" officeooo:paragraph-rsid="00241264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fo:font-style="normal" fo:font-weight="bold" officeooo:rsid="0024d617" officeooo:paragraph-rsid="0024d617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style="normal" fo:font-weight="bold" officeooo:rsid="002cbb9a" officeooo:paragraph-rsid="002cbb9a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font-style="normal" fo:font-weight="bold" officeooo:rsid="00274bb9" officeooo:paragraph-rsid="00274bb9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fo:font-style="normal" fo:font-weight="bold" officeooo:rsid="00352e90" officeooo:paragraph-rsid="00352e90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4pt" fo:font-style="normal" fo:font-weight="bold" officeooo:rsid="00352e90" officeooo:paragraph-rsid="003653b6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4pt" fo:font-style="normal" fo:font-weight="bold" officeooo:rsid="003dd70c" officeooo:paragraph-rsid="003dd70c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4pt" fo:font-style="normal" fo:font-weight="bold" officeooo:rsid="004b6545" officeooo:paragraph-rsid="004b6545" style:font-size-asian="12.25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4pt" fo:font-style="normal" fo:font-weight="bold" officeooo:rsid="004d32fb" officeooo:paragraph-rsid="004d32fb" style:font-size-asian="12.25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4pt" fo:font-style="normal" fo:font-weight="bold" officeooo:rsid="004d32fb" officeooo:paragraph-rsid="0054d7e8" style:font-size-asian="12.25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4pt" fo:font-style="normal" fo:font-weight="bold" officeooo:rsid="004fb091" officeooo:paragraph-rsid="004fb091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4pt" fo:font-style="normal" fo:font-weight="bold" officeooo:rsid="0054d7e8" officeooo:paragraph-rsid="0054d7e8" style:font-size-asian="12.25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4pt" fo:font-style="normal" fo:font-weight="bold" officeooo:rsid="0050c9f4" officeooo:paragraph-rsid="0051ae17" style:font-size-asian="12.25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4pt" fo:font-style="normal" fo:font-weight="bold" officeooo:rsid="0051ae17" officeooo:paragraph-rsid="0051ae17" style:font-size-asian="12.25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4pt" fo:font-style="normal" fo:font-weight="bold" officeooo:rsid="00563fff" officeooo:paragraph-rsid="00563fff" style:font-size-asian="12.25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4pt" fo:font-style="normal" fo:font-weight="bold" officeooo:rsid="005931b4" officeooo:paragraph-rsid="005931b4" style:font-size-asian="12.25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4pt" fo:font-style="normal" fo:font-weight="bold" officeooo:rsid="005bda02" officeooo:paragraph-rsid="005bda02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4pt" fo:font-style="normal" fo:font-weight="bold" officeooo:rsid="005e0dbe" officeooo:paragraph-rsid="005e0dbe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4pt" fo:font-style="normal" fo:font-weight="normal" officeooo:rsid="0013286c" officeooo:paragraph-rsid="0013286c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4pt" fo:font-style="normal" fo:font-weight="normal" officeooo:rsid="0014780d" officeooo:paragraph-rsid="0014780d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4pt" fo:font-style="normal" fo:font-weight="normal" officeooo:rsid="0014780d" officeooo:paragraph-rsid="001ff4c9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4pt" fo:font-style="normal" fo:font-weight="normal" officeooo:rsid="001611ca" officeooo:paragraph-rsid="001611ca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4pt" fo:font-style="normal" fo:font-weight="normal" officeooo:rsid="001611ca" officeooo:paragraph-rsid="001a8afa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4pt" fo:font-style="normal" fo:font-weight="normal" officeooo:rsid="001611ca" officeooo:paragraph-rsid="001ff4c9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4pt" fo:font-style="normal" fo:font-weight="normal" officeooo:rsid="001611ca" officeooo:paragraph-rsid="0018b875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4pt" fo:font-style="normal" fo:font-weight="normal" officeooo:rsid="0018b875" officeooo:paragraph-rsid="0018b875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4pt" fo:font-style="normal" fo:font-weight="normal" officeooo:rsid="001a4f31" officeooo:paragraph-rsid="001a4f31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4pt" fo:font-style="normal" fo:font-weight="normal" officeooo:rsid="001ff4c9" officeooo:paragraph-rsid="001ff4c9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4pt" fo:font-style="normal" fo:font-weight="normal" officeooo:rsid="001ff4c9" officeooo:paragraph-rsid="0021b721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4pt" fo:font-style="normal" fo:font-weight="normal" officeooo:rsid="001ff4c9" officeooo:paragraph-rsid="001e1a41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4pt" fo:font-style="normal" fo:font-weight="normal" officeooo:rsid="0021b721" officeooo:paragraph-rsid="0021b721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4pt" fo:font-style="normal" fo:font-weight="normal" officeooo:rsid="0012d1a4" officeooo:paragraph-rsid="0012d1a4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4pt" fo:font-style="normal" fo:font-weight="normal" officeooo:rsid="001626ce" officeooo:paragraph-rsid="001626ce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4pt" fo:font-style="normal" fo:font-weight="normal" officeooo:rsid="001626ce" officeooo:paragraph-rsid="0018b875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4pt" fo:font-style="normal" fo:font-weight="normal" officeooo:rsid="001626ce" officeooo:paragraph-rsid="001d7e7d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fo:font-style="normal" fo:font-weight="normal" officeooo:rsid="001626ce" officeooo:paragraph-rsid="00241264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4pt" fo:font-style="normal" fo:font-weight="normal" officeooo:rsid="001d845f" officeooo:paragraph-rsid="001d845f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4pt" fo:font-style="normal" fo:font-weight="normal" officeooo:rsid="0017de90" officeooo:paragraph-rsid="001626ce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4pt" fo:font-style="normal" fo:font-weight="normal" officeooo:rsid="0017dfb8" officeooo:paragraph-rsid="0017dfb8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4pt" fo:font-style="normal" fo:font-weight="normal" officeooo:rsid="001cf94b" officeooo:paragraph-rsid="001cf94b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4pt" fo:font-style="normal" fo:font-weight="normal" officeooo:rsid="0028d7f7" officeooo:paragraph-rsid="0028d7f7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4pt" fo:font-style="normal" fo:font-weight="normal" officeooo:rsid="0028d7f7" officeooo:paragraph-rsid="00274bb9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4pt" fo:font-style="normal" fo:font-weight="normal" officeooo:rsid="001e1a41" officeooo:paragraph-rsid="001e1a41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4pt" fo:font-style="normal" fo:font-weight="normal" officeooo:rsid="0024d617" officeooo:paragraph-rsid="0024d617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4pt" fo:font-style="normal" fo:font-weight="normal" officeooo:rsid="0025f454" officeooo:paragraph-rsid="0025f454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4pt" fo:font-style="normal" fo:font-weight="normal" officeooo:rsid="00274bb9" officeooo:paragraph-rsid="00274bb9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4pt" fo:font-style="normal" fo:font-weight="normal" officeooo:rsid="002c57e2" officeooo:paragraph-rsid="002c57e2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4pt" fo:font-style="normal" fo:font-weight="normal" officeooo:rsid="0034528e" officeooo:paragraph-rsid="0034528e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4pt" fo:font-style="normal" fo:font-weight="normal" officeooo:rsid="0021c3ec" officeooo:paragraph-rsid="0021c3ec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4pt" fo:font-style="normal" fo:font-weight="normal" officeooo:rsid="0038f56d" officeooo:paragraph-rsid="0038f56d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4pt" fo:font-style="normal" fo:font-weight="normal" officeooo:rsid="003ba6c9" officeooo:paragraph-rsid="001626ce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text-properties fo:font-size="14pt" fo:font-style="normal" fo:font-weight="normal" officeooo:rsid="003ba6c9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4pt" fo:font-style="normal" fo:font-weight="normal" officeooo:rsid="0041e4e0" officeooo:paragraph-rsid="0041e4e0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4pt" fo:font-style="normal" fo:font-weight="normal" officeooo:rsid="00432b57" officeooo:paragraph-rsid="00432b57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4pt" fo:font-style="normal" fo:font-weight="normal" officeooo:rsid="00442511" officeooo:paragraph-rsid="00442511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4pt" fo:font-style="normal" fo:font-weight="normal" officeooo:rsid="00407028" officeooo:paragraph-rsid="00407028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4pt" fo:font-style="normal" fo:font-weight="normal" officeooo:rsid="0029da75" officeooo:paragraph-rsid="0028d7f7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4pt" fo:font-style="normal" fo:font-weight="normal" officeooo:rsid="0018b875" officeooo:paragraph-rsid="0018b875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4pt" fo:font-style="normal" fo:font-weight="normal" officeooo:rsid="001b14fe" officeooo:paragraph-rsid="001b14fe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4pt" fo:font-style="normal" fo:font-weight="normal" officeooo:rsid="001c773d" officeooo:paragraph-rsid="001c773d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4pt" fo:font-style="normal" fo:font-weight="normal" officeooo:rsid="001c773d" officeooo:paragraph-rsid="001d7e7d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4pt" fo:font-style="normal" fo:font-weight="normal" officeooo:rsid="001d7e7d" officeooo:paragraph-rsid="001d7e7d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4pt" fo:font-style="normal" fo:font-weight="normal" officeooo:rsid="001d7e7d" officeooo:paragraph-rsid="001b14fe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4pt" fo:font-style="normal" fo:font-weight="normal" officeooo:rsid="001d845f" officeooo:paragraph-rsid="001d845f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4pt" fo:font-style="normal" fo:font-weight="normal" officeooo:rsid="001e1a41" officeooo:paragraph-rsid="001e1a41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4pt" fo:font-style="normal" fo:font-weight="normal" officeooo:rsid="0024d617" officeooo:paragraph-rsid="0024d617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4pt" fo:font-style="normal" fo:font-weight="normal" officeooo:rsid="0028d7f7" officeooo:paragraph-rsid="0028d7f7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4pt" fo:font-style="normal" fo:font-weight="normal" officeooo:rsid="00241264" officeooo:paragraph-rsid="00241264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4pt" fo:font-style="normal" fo:font-weight="normal" officeooo:rsid="002cbb9a" officeooo:paragraph-rsid="002cbb9a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4pt" fo:font-style="normal" fo:font-weight="normal" officeooo:rsid="002d88be" officeooo:paragraph-rsid="002d88be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4pt" fo:font-style="normal" fo:font-weight="normal" officeooo:rsid="002d88be" officeooo:paragraph-rsid="002e4129" style:font-size-asian="12.25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4pt" fo:font-style="normal" fo:font-weight="normal" officeooo:rsid="002f7b7c" officeooo:paragraph-rsid="002f7b7c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4pt" fo:font-style="normal" fo:font-weight="normal" officeooo:rsid="002f7b7c" officeooo:paragraph-rsid="002f9fe4" style:font-size-asian="12.25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4pt" fo:font-style="normal" fo:font-weight="normal" officeooo:rsid="002f7b7c" officeooo:paragraph-rsid="0038f56d" style:font-size-asian="12.25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4pt" fo:font-style="normal" fo:font-weight="normal" officeooo:rsid="002f7b7c" officeooo:paragraph-rsid="003c6d38" style:font-size-asian="12.25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4pt" fo:font-style="normal" fo:font-weight="normal" officeooo:rsid="002f9fe4" officeooo:paragraph-rsid="002f9fe4" style:font-size-asian="12.25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4pt" fo:font-style="normal" fo:font-weight="normal" officeooo:rsid="00309dea" officeooo:paragraph-rsid="00309dea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4pt" fo:font-style="normal" fo:font-weight="normal" officeooo:rsid="00352e90" officeooo:paragraph-rsid="00352e90" style:font-size-asian="12.25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4pt" fo:font-style="normal" fo:font-weight="normal" officeooo:rsid="00352e90" officeooo:paragraph-rsid="003653b6" style:font-size-asian="12.25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4pt" fo:font-style="normal" fo:font-weight="normal" officeooo:rsid="00352e90" officeooo:paragraph-rsid="00378d68" style:font-size-asian="12.25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4pt" fo:font-style="normal" fo:font-weight="normal" officeooo:rsid="003653b6" officeooo:paragraph-rsid="003653b6" style:font-size-asian="12.25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4pt" fo:font-style="normal" fo:font-weight="normal" officeooo:rsid="0038f56d" officeooo:paragraph-rsid="0038f56d" style:font-size-asian="12.25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4pt" fo:font-style="normal" fo:font-weight="normal" officeooo:rsid="003dd70c" officeooo:paragraph-rsid="003dd70c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4pt" fo:font-style="normal" fo:font-weight="normal" officeooo:rsid="0047cfa6" officeooo:paragraph-rsid="0047cfa6" style:font-size-asian="12.25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4pt" fo:font-style="normal" fo:font-weight="normal" officeooo:rsid="004b6545" officeooo:paragraph-rsid="004b6545" style:font-size-asian="12.25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4pt" fo:font-style="normal" fo:font-weight="normal" officeooo:rsid="004d32fb" officeooo:paragraph-rsid="004d32fb" style:font-size-asian="12.25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4pt" fo:font-style="normal" fo:font-weight="normal" officeooo:rsid="0013286c" officeooo:paragraph-rsid="0013286c" fo:background-color="#729fcf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4pt" fo:font-style="normal" fo:font-weight="normal" officeooo:rsid="0013dd00" officeooo:paragraph-rsid="0013dd00" fo:background-color="#729fcf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4pt" fo:font-style="normal" fo:font-weight="normal" officeooo:paragraph-rsid="001611ca"/>
    </style:style>
    <style:style style:name="P138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626ce" officeooo:paragraph-rsid="0025e5b4" style:font-size-asian="14pt" style:font-style-asian="normal" style:font-weight-asian="bold" style:font-size-complex="14pt" style:font-style-complex="normal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626ce" officeooo:paragraph-rsid="002b1a8f" style:font-size-asian="14pt" style:font-style-asian="normal" style:font-weight-asian="bold" style:font-size-complex="14pt" style:font-style-complex="normal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626ce" officeooo:paragraph-rsid="0021b721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626ce" officeooo:paragraph-rsid="0021c3ec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8f56d" officeooo:paragraph-rsid="0038f56d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officeooo:paragraph-rsid="0017dfb8"/>
    </style:style>
    <style:style style:name="P144" style:family="paragraph" style:parent-style-name="Standard">
      <style:paragraph-properties fo:text-align="start" style:justify-single-word="false">
        <style:tab-stops/>
      </style:paragraph-properties>
    </style:style>
    <style:style style:name="P145" style:family="paragraph" style:parent-style-name="Standard">
      <style:paragraph-properties fo:text-align="start" style:justify-single-word="false"/>
      <style:text-properties officeooo:rsid="001626ce" officeooo:paragraph-rsid="001626ce"/>
    </style:style>
    <style:style style:name="P146" style:family="paragraph" style:parent-style-name="Standard">
      <style:paragraph-properties fo:text-align="start" style:justify-single-word="false"/>
      <style:text-properties fo:font-style="normal" officeooo:rsid="001626ce" officeooo:paragraph-rsid="001626ce" style:font-style-asian="normal" style:font-style-complex="normal"/>
    </style:style>
    <style:style style:name="P147" style:family="paragraph" style:parent-style-name="Standard">
      <style:paragraph-properties fo:text-align="start" style:justify-single-word="false"/>
      <style:text-properties fo:font-style="normal" officeooo:rsid="0017de90" officeooo:paragraph-rsid="0017de90" style:font-style-asian="normal" style:font-style-complex="normal"/>
    </style:style>
    <style:style style:name="P148" style:family="paragraph" style:parent-style-name="Standard">
      <style:paragraph-properties fo:text-align="start" style:justify-single-word="false"/>
      <style:text-properties fo:font-style="normal" officeooo:rsid="0017dfb8" officeooo:paragraph-rsid="0017dfb8" style:font-style-asian="normal" style:font-style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3286c" officeooo:paragraph-rsid="0013286c" fo:background-color="#729fcf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_5b_Basic_20_Paragraph_5d_">
      <style:paragraph-properties fo:margin-left="0cm" fo:margin-right="0cm" fo:line-height="120%" fo:text-align="start" style:justify-single-word="false" fo:text-indent="0cm" style:auto-text-indent="false"/>
      <style:text-properties style:font-name="Liberation Serif" fo:font-size="14pt" fo:font-style="normal" fo:font-weight="normal" officeooo:rsid="0013286c" officeooo:paragraph-rsid="0013286c" fo:background-color="#729fcf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_5b_Basic_20_Paragraph_5d_">
      <style:paragraph-properties fo:margin-left="0cm" fo:margin-right="0cm" fo:line-height="120%" fo:text-align="start" style:justify-single-word="false" fo:text-indent="0cm" style:auto-text-indent="false"/>
      <style:text-properties style:font-name="Liberation Serif" fo:font-size="14pt" fo:font-style="normal" fo:font-weight="normal" officeooo:rsid="0025e5b4" officeooo:paragraph-rsid="0025e5b4" fo:background-color="#729fcf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25e5b4" officeooo:paragraph-rsid="0025e5b4" fo:background-color="#729fcf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426cc8" officeooo:paragraph-rsid="00426cc8" fo:background-color="#729fcf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9pt" fo:font-style="normal" fo:font-weight="bold" officeooo:rsid="001d845f" officeooo:paragraph-rsid="00241264" style:font-size-asian="19pt" style:font-style-asian="normal" style:font-weight-asian="bold" style:font-size-complex="19pt" style:font-style-complex="normal" style:font-weight-complex="bold"/>
    </style:style>
    <style:style style:name="P155" style:family="paragraph" style:parent-style-name="Standard">
      <style:paragraph-properties fo:text-align="start" style:justify-single-word="false"/>
      <style:text-properties officeooo:rsid="001611ca" officeooo:paragraph-rsid="001611ca"/>
    </style:style>
    <style:style style:name="P156" style:family="paragraph" style:parent-style-name="Standard">
      <style:paragraph-properties fo:text-align="start" style:justify-single-word="false"/>
      <style:text-properties officeooo:rsid="0051ae17" officeooo:paragraph-rsid="0051ae17"/>
    </style:style>
    <style:style style:name="P157" style:family="paragraph" style:parent-style-name="Standard">
      <style:paragraph-properties fo:text-align="start" style:justify-single-word="false"/>
      <style:text-properties officeooo:rsid="00563fff" officeooo:paragraph-rsid="00563fff"/>
    </style:style>
    <style:style style:name="P158" style:family="paragraph" style:parent-style-name="Standard">
      <style:paragraph-properties fo:text-align="start" style:justify-single-word="false"/>
      <style:text-properties officeooo:paragraph-rsid="006124ff"/>
    </style:style>
    <style:style style:name="P159" style:family="paragraph" style:parent-style-name="Standard">
      <style:paragraph-properties fo:text-align="start" style:justify-single-word="false"/>
      <style:text-properties fo:font-size="16pt" fo:font-style="normal" fo:font-weight="normal" officeooo:rsid="00442511" officeooo:paragraph-rsid="006124ff" style:font-size-asian="16pt" style:font-style-asian="normal" style:font-weight-asian="normal" style:font-size-complex="16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6pt" fo:font-style="normal" fo:font-weight="normal" officeooo:rsid="00432b57" officeooo:paragraph-rsid="006124ff" style:font-size-asian="16pt" style:font-style-asian="normal" style:font-weight-asian="normal" style:font-size-complex="16pt" style:font-style-complex="normal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size="14pt" fo:font-style="normal" fo:font-weight="bold" officeooo:rsid="005bda02" officeooo:paragraph-rsid="006124ff" style:font-size-asian="12.25pt" style:font-style-asian="normal" style:font-weight-asian="bold" style:font-size-complex="14pt" style:font-style-complex="normal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4pt" fo:font-style="normal" fo:font-weight="bold" officeooo:rsid="004d32fb" officeooo:paragraph-rsid="006124ff" style:font-size-asian="12.25pt" style:font-style-asian="normal" style:font-weight-asian="bold" style:font-size-complex="14pt" style:font-style-complex="normal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4pt" fo:font-style="normal" fo:font-weight="bold" officeooo:rsid="00432b57" officeooo:paragraph-rsid="006124ff" style:font-size-asian="14pt" style:font-style-asian="normal" style:font-weight-asian="bold" style:font-size-complex="14pt" style:font-style-complex="normal" style:font-weight-complex="bold"/>
    </style:style>
    <style:style style:name="P16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size="14pt" fo:font-style="normal" fo:font-weight="normal" officeooo:rsid="005bda02" officeooo:paragraph-rsid="006124ff" style:font-size-asian="12.25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size="14pt" fo:font-style="normal" fo:font-weight="normal" officeooo:rsid="00432b57" officeooo:paragraph-rsid="006124f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e4129" style:font-style-asian="italic" style:font-style-complex="italic"/>
    </style:style>
    <style:style style:name="T7" style:family="text">
      <style:text-properties fo:font-style="italic" officeooo:rsid="002f9fe4" style:font-style-asian="italic" style:font-style-complex="italic"/>
    </style:style>
    <style:style style:name="T8" style:family="text">
      <style:text-properties fo:font-style="italic" officeooo:rsid="0038f56d" style:font-style-asian="italic" style:font-style-complex="italic"/>
    </style:style>
    <style:style style:name="T9" style:family="text">
      <style:text-properties fo:font-style="italic" officeooo:rsid="002f7b7c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1626ce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3286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626ce" style:font-style-asian="normal" style:font-weight-asian="normal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3286c" style:font-weight-asian="normal" style:font-weight-complex="normal"/>
    </style:style>
    <style:style style:name="T18" style:family="text">
      <style:text-properties fo:font-weight="normal" officeooo:rsid="0017dfb8" style:font-weight-asian="normal" style:font-weight-complex="normal"/>
    </style:style>
    <style:style style:name="T19" style:family="text">
      <style:text-properties fo:font-weight="normal" officeooo:rsid="0018b875" style:font-weight-asian="normal" style:font-weight-complex="normal"/>
    </style:style>
    <style:style style:name="T20" style:family="text">
      <style:text-properties fo:font-weight="normal" officeooo:rsid="001626ce" style:font-weight-asian="normal" style:font-weight-complex="normal"/>
    </style:style>
    <style:style style:name="T21" style:family="text">
      <style:text-properties fo:font-weight="normal" officeooo:rsid="0017de90" style:font-weight-asian="normal" style:font-weight-complex="normal"/>
    </style:style>
    <style:style style:name="T22" style:family="text">
      <style:text-properties fo:font-weight="normal" officeooo:rsid="001611ca" style:font-weight-asian="normal" style:font-weight-complex="normal"/>
    </style:style>
    <style:style style:name="T23" style:family="text">
      <style:text-properties fo:font-weight="normal" officeooo:rsid="001d845f" style:font-weight-asian="normal" style:font-weight-complex="normal"/>
    </style:style>
    <style:style style:name="T24" style:family="text">
      <style:text-properties fo:font-weight="normal" officeooo:rsid="001e1a41" style:font-weight-asian="normal" style:font-weight-complex="normal"/>
    </style:style>
    <style:style style:name="T25" style:family="text">
      <style:text-properties fo:font-weight="normal" officeooo:rsid="001ff4c9" style:font-weight-asian="normal" style:font-weight-complex="normal"/>
    </style:style>
    <style:style style:name="T26" style:family="text">
      <style:text-properties fo:font-weight="normal" officeooo:rsid="001a4f31" style:font-weight-asian="normal" style:font-weight-complex="normal"/>
    </style:style>
    <style:style style:name="T27" style:family="text">
      <style:text-properties fo:font-weight="normal" officeooo:rsid="0024d617" style:font-weight-asian="normal" style:font-weight-complex="normal"/>
    </style:style>
    <style:style style:name="T28" style:family="text">
      <style:text-properties fo:font-weight="normal" officeooo:rsid="00378d68" style:font-weight-asian="normal" style:font-weight-complex="normal"/>
    </style:style>
    <style:style style:name="T29" style:family="text">
      <style:text-properties fo:font-weight="normal" officeooo:rsid="00563fff" style:font-weight-asian="normal" style:font-weight-complex="normal"/>
    </style:style>
    <style:style style:name="T30" style:family="text">
      <style:text-properties fo:font-weight="normal" officeooo:rsid="005ca7d1" style:font-weight-asian="normal" style:font-weight-complex="normal"/>
    </style:style>
    <style:style style:name="T31" style:family="text">
      <style:text-properties fo:font-weight="normal" officeooo:rsid="005e0dbe" style:font-weight-asian="normal" style:font-weight-complex="normal"/>
    </style:style>
    <style:style style:name="T32" style:family="text">
      <style:text-properties fo:font-weight="normal" style:font-size-asian="14pt" style:font-weight-asian="normal" style:font-weight-complex="normal"/>
    </style:style>
    <style:style style:name="T33" style:family="text">
      <style:text-properties fo:font-weight="normal" officeooo:rsid="001611ca" style:font-size-asian="14pt" style:font-weight-asian="normal" style:font-weight-complex="normal"/>
    </style:style>
    <style:style style:name="T34" style:family="text">
      <style:text-properties fo:font-weight="normal" officeooo:rsid="001a4f31" style:font-size-asian="14pt" style:font-weight-asian="normal" style:font-weight-complex="normal"/>
    </style:style>
    <style:style style:name="T35" style:family="text">
      <style:text-properties fo:font-weight="normal" officeooo:rsid="0028d7f7" style:font-size-asian="14pt" style:font-weight-asian="normal" style:font-weight-complex="normal"/>
    </style:style>
    <style:style style:name="T36" style:family="text">
      <style:text-properties fo:font-size="14pt" fo:font-style="normal" fo:font-weight="normal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officeooo:rsid="0012d1a4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font-style="normal" fo:font-weight="normal" officeooo:rsid="001611ca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style="normal" fo:font-weight="normal" officeooo:rsid="001626ce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font-style="normal" fo:font-weight="normal" officeooo:rsid="0017de90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size="14pt" fo:font-style="normal" fo:font-weight="normal" officeooo:rsid="0017dfb8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style="normal" fo:font-weight="normal" officeooo:rsid="002c57e2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font-style="normal" officeooo:rsid="001611ca" style:font-size-asian="14pt" style:font-style-asian="normal" style:font-size-complex="14pt" style:font-style-complex="normal"/>
    </style:style>
    <style:style style:name="T45" style:family="text">
      <style:text-properties fo:font-size="14pt" fo:font-style="normal" officeooo:rsid="001626ce" style:font-size-asian="14pt" style:font-style-asian="normal" style:font-size-complex="14pt" style:font-style-complex="normal"/>
    </style:style>
    <style:style style:name="T46" style:family="text">
      <style:text-properties fo:font-size="14pt" fo:font-style="normal" officeooo:rsid="0032f559" style:font-size-asian="14pt" style:font-style-asian="normal" style:font-size-complex="14pt" style:font-style-complex="normal"/>
    </style:style>
    <style:style style:name="T47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48" style:family="text">
      <style:text-properties fo:font-size="14pt" fo:font-style="normal" fo:font-weight="bold" officeooo:rsid="004d32fb" style:font-size-asian="12.25pt" style:font-style-asian="normal" style:font-weight-asian="bold" style:font-size-complex="14pt" style:font-style-complex="normal" style:font-weight-complex="bold"/>
    </style:style>
    <style:style style:name="T49" style:family="text">
      <style:text-properties fo:font-size="14pt" fo:font-style="normal" fo:font-weight="bold" officeooo:rsid="004e6156" style:font-size-asian="12.25pt" style:font-style-asian="normal" style:font-weight-asian="bold" style:font-size-complex="14pt" style:font-style-complex="normal" style:font-weight-complex="bold"/>
    </style:style>
    <style:style style:name="T50" style:family="text">
      <style:text-properties fo:font-size="14pt" fo:font-style="normal" fo:font-weight="bold" officeooo:rsid="004fb091" style:font-size-asian="12.25pt" style:font-style-asian="normal" style:font-weight-asian="bold" style:font-size-complex="14pt" style:font-style-complex="normal" style:font-weight-complex="bold"/>
    </style:style>
    <style:style style:name="T51" style:family="text">
      <style:text-properties fo:font-size="14pt" fo:font-style="normal" fo:font-weight="bold" officeooo:rsid="0050c9f4" style:font-size-asian="12.25pt" style:font-style-asian="normal" style:font-weight-asian="bold" style:font-size-complex="14pt" style:font-style-complex="normal" style:font-weight-complex="bold"/>
    </style:style>
    <style:style style:name="T52" style:family="text">
      <style:text-properties fo:font-size="14pt" fo:font-style="normal" fo:font-weight="bold" officeooo:rsid="005351c9" style:font-size-asian="12.25pt" style:font-style-asian="normal" style:font-weight-asian="bold" style:font-size-complex="14pt" style:font-style-complex="normal" style:font-weight-complex="bold"/>
    </style:style>
    <style:style style:name="T53" style:family="text">
      <style:text-properties fo:font-size="14pt" fo:font-style="normal" fo:font-weight="bold" officeooo:rsid="0054d7e8" style:font-size-asian="12.25pt" style:font-style-asian="normal" style:font-weight-asian="bold" style:font-size-complex="14pt" style:font-style-complex="normal" style:font-weight-complex="bold"/>
    </style:style>
    <style:style style:name="T54" style:family="text">
      <style:text-properties fo:font-size="14pt" fo:font-style="normal" fo:font-weight="bold" officeooo:rsid="00570bdf" style:font-size-asian="12.25pt" style:font-style-asian="normal" style:font-weight-asian="bold" style:font-size-complex="14pt" style:font-style-complex="normal" style:font-weight-complex="bold"/>
    </style:style>
    <style:style style:name="T55" style:family="text">
      <style:text-properties fo:font-size="14pt" fo:font-weight="normal" style:font-size-asian="14pt" style:font-weight-asian="normal" style:font-size-complex="14pt" style:font-weight-complex="normal"/>
    </style:style>
    <style:style style:name="T56" style:family="text">
      <style:text-properties fo:font-size="14pt" fo:font-weight="normal" officeooo:rsid="001611ca" style:font-size-asian="14pt" style:font-weight-asian="normal" style:font-size-complex="14pt" style:font-weight-complex="normal"/>
    </style:style>
    <style:style style:name="T57" style:family="text">
      <style:text-properties fo:font-size="14pt" fo:font-weight="normal" officeooo:rsid="0017de90" style:font-size-asian="14pt" style:font-weight-asian="normal" style:font-size-complex="14pt" style:font-weight-complex="normal"/>
    </style:style>
    <style:style style:name="T58" style:family="text">
      <style:text-properties fo:font-size="14pt" fo:font-weight="normal" officeooo:rsid="0017dfb8" style:font-size-asian="14pt" style:font-weight-asian="normal" style:font-size-complex="14pt" style:font-weight-complex="normal"/>
    </style:style>
    <style:style style:name="T59" style:family="text">
      <style:text-properties fo:font-size="14pt" fo:font-weight="normal" officeooo:rsid="002c57e2" style:font-size-asian="14pt" style:font-weight-asian="normal" style:font-size-complex="14pt" style:font-weight-complex="normal"/>
    </style:style>
    <style:style style:name="T6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1a4f31" style:font-weight-asian="bold" style:font-weight-complex="bold"/>
    </style:style>
    <style:style style:name="T64" style:family="text">
      <style:text-properties fo:font-weight="bold" officeooo:rsid="001ff4c9" style:font-weight-asian="bold" style:font-weight-complex="bold"/>
    </style:style>
    <style:style style:name="T65" style:family="text">
      <style:text-properties fo:font-weight="bold" officeooo:rsid="0021b721" style:font-weight-asian="bold" style:font-weight-complex="bold"/>
    </style:style>
    <style:style style:name="T66" style:family="text">
      <style:text-properties fo:font-weight="bold" officeooo:rsid="002e4129" style:font-weight-asian="bold" style:font-weight-complex="bold"/>
    </style:style>
    <style:style style:name="T67" style:family="text">
      <style:text-properties fo:font-weight="bold" officeooo:rsid="002f9fe4" style:font-weight-asian="bold" style:font-weight-complex="bold"/>
    </style:style>
    <style:style style:name="T68" style:family="text">
      <style:text-properties fo:font-weight="bold" officeooo:rsid="002f7b7c" style:font-weight-asian="bold" style:font-weight-complex="bold"/>
    </style:style>
    <style:style style:name="T69" style:family="text">
      <style:text-properties fo:font-weight="bold" officeooo:rsid="003653b6" style:font-weight-asian="bold" style:font-weight-complex="bold"/>
    </style:style>
    <style:style style:name="T70" style:family="text">
      <style:text-properties fo:font-weight="bold" officeooo:rsid="0038f56d" style:font-weight-asian="bold" style:font-weight-complex="bold"/>
    </style:style>
    <style:style style:name="T71" style:family="text">
      <style:text-properties fo:font-weight="bold" officeooo:rsid="0047cfa6" style:font-weight-asian="bold" style:font-weight-complex="bold"/>
    </style:style>
    <style:style style:name="T72" style:family="text">
      <style:text-properties fo:font-weight="bold" officeooo:rsid="004d32fb" style:font-weight-asian="bold" style:font-weight-complex="bold"/>
    </style:style>
    <style:style style:name="T73" style:family="text">
      <style:text-properties officeooo:rsid="0013dd00"/>
    </style:style>
    <style:style style:name="T74" style:family="text">
      <style:text-properties officeooo:rsid="001611ca"/>
    </style:style>
    <style:style style:name="T75" style:family="text">
      <style:text-properties fo:font-variant="normal" fo:text-transform="none" fo:color="#000000" loext:opacity="100%" style:font-name="Liberation Serif" fo:letter-spacing="normal" style:font-size-asian="14pt"/>
    </style:style>
    <style:style style:name="T76" style:family="text">
      <style:text-properties fo:font-variant="normal" fo:text-transform="none" fo:color="#000000" loext:opacity="100%" style:font-name="Georgia" fo:font-size="12pt" fo:letter-spacing="normal" fo:font-style="normal"/>
    </style:style>
    <style:style style:name="T77" style:family="text">
      <style:text-properties fo:font-variant="normal" fo:text-transform="none" fo:color="#000000" loext:opacity="100%" style:font-name="Georgia" fo:font-size="12pt" fo:letter-spacing="normal" officeooo:rsid="00352e90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officeooo:rsid="001626ce"/>
    </style:style>
    <style:style style:name="T79" style:family="text">
      <style:text-properties officeooo:rsid="0017dfb8"/>
    </style:style>
    <style:style style:name="T80" style:family="text">
      <style:text-properties officeooo:rsid="0018d1f8"/>
    </style:style>
    <style:style style:name="T81" style:family="text">
      <style:text-properties officeooo:rsid="001a4f31"/>
    </style:style>
    <style:style style:name="T82" style:family="text">
      <style:text-properties officeooo:rsid="001c773d"/>
    </style:style>
    <style:style style:name="T83" style:family="text">
      <style:text-properties style:font-size-asian="14pt"/>
    </style:style>
    <style:style style:name="T84" style:family="text">
      <style:text-properties officeooo:rsid="001611ca" style:font-size-asian="14pt"/>
    </style:style>
    <style:style style:name="T85" style:family="text">
      <style:text-properties officeooo:rsid="001626ce" style:font-size-asian="14pt"/>
    </style:style>
    <style:style style:name="T86" style:family="text">
      <style:text-properties officeooo:rsid="001cf94b" style:font-size-asian="14pt"/>
    </style:style>
    <style:style style:name="T87" style:family="text">
      <style:text-properties officeooo:rsid="001d24eb" style:font-size-asian="14pt"/>
    </style:style>
    <style:style style:name="T88" style:family="text">
      <style:text-properties officeooo:rsid="0017dfb8" style:font-size-asian="14pt"/>
    </style:style>
    <style:style style:name="T89" style:family="text">
      <style:text-properties officeooo:rsid="001d7e7d" style:font-size-asian="14pt"/>
    </style:style>
    <style:style style:name="T90" style:family="text">
      <style:text-properties officeooo:rsid="001a4f31" style:font-size-asian="14pt"/>
    </style:style>
    <style:style style:name="T91" style:family="text">
      <style:text-properties officeooo:rsid="002d88be" style:font-size-asian="14pt"/>
    </style:style>
    <style:style style:name="T92" style:family="text">
      <style:text-properties officeooo:rsid="002f9fe4" style:font-size-asian="14pt"/>
    </style:style>
    <style:style style:name="T93" style:family="text">
      <style:text-properties officeooo:rsid="00309dea" style:font-size-asian="14pt"/>
    </style:style>
    <style:style style:name="T94" style:family="text">
      <style:text-properties officeooo:rsid="001611ca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officeooo:rsid="00352e90" style:font-size-asian="14pt"/>
    </style:style>
    <style:style style:name="T96" style:family="text">
      <style:text-properties officeooo:rsid="003653b6" style:font-size-asian="14pt"/>
    </style:style>
    <style:style style:name="T97" style:family="text">
      <style:text-properties officeooo:rsid="0039f370" style:font-size-asian="14pt"/>
    </style:style>
    <style:style style:name="T98" style:family="text">
      <style:text-properties officeooo:rsid="003c6d38" style:font-size-asian="14pt"/>
    </style:style>
    <style:style style:name="T99" style:family="text">
      <style:text-properties officeooo:rsid="004b6545" style:font-size-asian="14pt"/>
    </style:style>
    <style:style style:name="T100" style:family="text">
      <style:text-properties officeooo:rsid="00432b57" style:font-size-asian="14pt"/>
    </style:style>
    <style:style style:name="T101" style:family="text">
      <style:text-properties officeooo:rsid="00442511" style:font-size-asian="14pt"/>
    </style:style>
    <style:style style:name="T102" style:family="text">
      <style:text-properties officeooo:rsid="001c773d" style:font-size-asian="14pt"/>
    </style:style>
    <style:style style:name="T103" style:family="text">
      <style:text-properties officeooo:rsid="001cf94b"/>
    </style:style>
    <style:style style:name="T104" style:family="text">
      <style:text-properties officeooo:rsid="001d7e7d"/>
    </style:style>
    <style:style style:name="T105" style:family="text">
      <style:text-properties officeooo:rsid="001e1a41"/>
    </style:style>
    <style:style style:name="T106" style:family="text">
      <style:text-properties style:text-underline-style="none"/>
    </style:style>
    <style:style style:name="T107" style:family="text">
      <style:text-properties style:text-underline-style="none" fo:font-weight="bold" style:font-weight-asian="bold" style:font-weight-complex="bold"/>
    </style:style>
    <style:style style:name="T108" style:family="text">
      <style:text-properties style:text-underline-style="none" fo:font-weight="bold" officeooo:rsid="001626ce" style:font-weight-asian="bold" style:font-weight-complex="bold"/>
    </style:style>
    <style:style style:name="T109" style:family="text">
      <style:text-properties style:text-underline-style="none" officeooo:rsid="001a4f31"/>
    </style:style>
    <style:style style:name="T110" style:family="text">
      <style:text-properties style:text-underline-style="none" officeooo:rsid="001626ce"/>
    </style:style>
    <style:style style:name="T111" style:family="text">
      <style:text-properties style:text-underline-style="none" officeooo:rsid="0021c3ec"/>
    </style:style>
    <style:style style:name="T112" style:family="text">
      <style:text-properties style:text-underline-style="none" officeooo:rsid="001ff4c9"/>
    </style:style>
    <style:style style:name="T113" style:family="text">
      <style:text-properties style:text-underline-style="none" officeooo:rsid="00223e5d"/>
    </style:style>
    <style:style style:name="T114" style:family="text">
      <style:text-properties style:text-underline-style="none" officeooo:rsid="0017dfb8"/>
    </style:style>
    <style:style style:name="T115" style:family="text">
      <style:text-properties style:text-underline-style="none" officeooo:rsid="001d845f"/>
    </style:style>
    <style:style style:name="T116" style:family="text">
      <style:text-properties style:text-underline-style="none" officeooo:rsid="003dd70c"/>
    </style:style>
    <style:style style:name="T117" style:family="text">
      <style:text-properties officeooo:rsid="0021b721"/>
    </style:style>
    <style:style style:name="T118" style:family="text">
      <style:text-properties officeooo:rsid="00241264"/>
    </style:style>
    <style:style style:name="T119" style:family="text">
      <style:text-properties officeooo:rsid="002c57e2"/>
    </style:style>
    <style:style style:name="T120" style:family="text">
      <style:text-properties officeooo:rsid="002d88be"/>
    </style:style>
    <style:style style:name="T121" style:family="text">
      <style:text-properties officeooo:rsid="002e4129"/>
    </style:style>
    <style:style style:name="T122" style:family="text">
      <style:text-properties officeooo:rsid="002f7b7c"/>
    </style:style>
    <style:style style:name="T123" style:family="text">
      <style:text-properties officeooo:rsid="002f9fe4"/>
    </style:style>
    <style:style style:name="T124" style:family="text">
      <style:text-properties officeooo:rsid="0032f559"/>
    </style:style>
    <style:style style:name="T125" style:family="text">
      <style:text-properties officeooo:rsid="0034528e"/>
    </style:style>
    <style:style style:name="T126" style:family="text">
      <style:text-properties officeooo:rsid="0034528e" style:font-size-asian="15pt" style:font-weight-asian="normal" style:font-size-complex="15pt" style:font-weight-complex="normal"/>
    </style:style>
    <style:style style:name="T127" style:family="text">
      <style:text-properties officeooo:rsid="001611ca" style:font-size-asian="15pt" style:font-weight-asian="normal" style:font-size-complex="15pt" style:font-weight-complex="normal"/>
    </style:style>
    <style:style style:name="T128" style:family="text">
      <style:text-properties officeooo:rsid="003653b6"/>
    </style:style>
    <style:style style:name="T129" style:family="text">
      <style:text-properties officeooo:rsid="0038f56d"/>
    </style:style>
    <style:style style:name="T130" style:family="text">
      <style:text-properties officeooo:rsid="0039f370"/>
    </style:style>
    <style:style style:name="T131" style:family="text">
      <style:text-properties officeooo:rsid="00442511"/>
    </style:style>
    <style:style style:name="T132" style:family="text">
      <style:text-properties officeooo:rsid="001d24eb"/>
    </style:style>
    <style:style style:name="T133" style:family="text">
      <style:text-properties officeooo:rsid="001d845f"/>
    </style:style>
    <style:style style:name="T134" style:family="text">
      <style:text-properties officeooo:rsid="001ff4c9"/>
    </style:style>
    <style:style style:name="T135" style:family="text">
      <style:text-properties officeooo:rsid="00449cfc"/>
    </style:style>
    <style:style style:name="T136" style:family="text">
      <style:text-properties officeooo:rsid="004686e6"/>
    </style:style>
    <style:style style:name="T137" style:family="text">
      <style:text-properties officeooo:rsid="0047cfa6"/>
    </style:style>
    <style:style style:name="T138" style:family="text">
      <style:text-properties officeooo:rsid="0047eaba"/>
    </style:style>
    <style:style style:name="T139" style:family="text">
      <style:text-properties officeooo:rsid="004b6545"/>
    </style:style>
    <style:style style:name="T140" style:family="text">
      <style:text-properties officeooo:rsid="003dd70c"/>
    </style:style>
    <style:style style:name="T141" style:family="text">
      <style:text-properties officeooo:rsid="004d32fb"/>
    </style:style>
    <style:style style:name="T142" style:family="text">
      <style:text-properties officeooo:rsid="0051ae17"/>
    </style:style>
    <style:style style:name="T143" style:family="text">
      <style:text-properties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weight-complex="bold" style:text-emphasize="none"/>
    </style:style>
    <style:style style:name="T144" style:family="text">
      <style:text-properties style:text-outline="false" style:text-line-through-style="none" style:text-line-through-type="none" style:font-name="Liberation Serif" fo:text-shadow="none" style:text-underline-style="none" officeooo:rsid="005ca7d1" style:font-size-asian="14pt" style:text-emphasize="none"/>
    </style:style>
    <style:style style:name="T145" style:family="text">
      <style:text-properties officeooo:rsid="0054d7e8"/>
    </style:style>
    <style:style style:name="T146" style:family="text">
      <style:text-properties officeooo:rsid="00563fff"/>
    </style:style>
    <style:style style:name="T147" style:family="text">
      <style:text-properties officeooo:rsid="0056db45"/>
    </style:style>
    <style:style style:name="T148" style:family="text">
      <style:text-properties officeooo:rsid="005b1816"/>
    </style:style>
    <style:style style:name="T149" style:family="text">
      <style:text-properties officeooo:rsid="005bda02"/>
    </style:style>
    <style:style style:name="T150" style:family="text">
      <style:text-properties officeooo:rsid="005ca7d1"/>
    </style:style>
    <style:style style:name="T151" style:family="text">
      <style:text-properties officeooo:rsid="005e0dbe"/>
    </style:style>
    <style:style style:name="T152" style:family="text">
      <style:text-properties fo:font-size="16pt" fo:font-style="normal" fo:font-weight="normal" officeooo:rsid="00432b57" style:font-size-asian="16pt" style:font-style-asian="normal" style:font-weight-asian="normal" style:font-size-complex="16pt" style:font-style-complex="normal" style:font-weight-complex="normal"/>
    </style:style>
    <style:style style:name="T153" style:family="text">
      <style:text-properties fo:font-size="16pt" fo:font-style="normal" fo:font-weight="normal" officeooo:rsid="00442511" style:font-size-asian="16pt" style:font-style-asian="normal" style:font-weight-asian="normal" style:font-size-complex="16pt" style:font-style-complex="normal" style:font-weight-complex="normal"/>
    </style:style>
    <style:style style:name="T154" style:family="text">
      <style:text-properties fo:font-size="16pt" fo:font-style="normal" fo:font-weight="normal" officeooo:rsid="001c773d" style:font-size-asian="16pt" style:font-style-asian="normal" style:font-weight-asian="normal" style:font-size-complex="16pt" style:font-style-complex="normal" style:font-weight-complex="normal"/>
    </style:style>
    <style:style style:name="T155" style:family="text">
      <style:text-properties fo:font-size="16pt" fo:font-style="normal" fo:font-weight="normal" officeooo:rsid="001611ca" style:font-size-asian="16pt" style:font-style-asian="normal" style:font-weight-asian="normal" style:font-size-complex="16pt" style:font-style-complex="normal" style:font-weight-complex="normal"/>
    </style:style>
    <style:style style:name="T156" style:family="text">
      <style:text-properties fo:font-size="16pt" fo:font-style="normal" fo:font-weight="normal" officeooo:rsid="001d7e7d" style:font-size-asian="16pt" style:font-style-asian="normal" style:font-weight-asian="normal" style:font-size-complex="16pt" style:font-style-complex="normal" style:font-weight-complex="normal"/>
    </style:style>
    <style:style style:name="T157" style:family="text">
      <style:text-properties fo:font-size="16pt" fo:font-style="normal" fo:font-weight="normal" officeooo:rsid="001cf94b" style:font-size-asian="16pt" style:font-style-asian="normal" style:font-weight-asian="normal" style:font-size-complex="16pt" style:font-style-complex="normal" style:font-weight-complex="normal"/>
    </style:style>
    <style:style style:name="T158" style:family="text">
      <style:text-properties fo:font-size="16pt" fo:font-style="normal" fo:font-weight="normal" officeooo:rsid="001d24eb" style:font-size-asian="16pt" style:font-style-asian="normal" style:font-weight-asian="normal" style:font-size-complex="16pt" style:font-style-complex="normal" style:font-weight-complex="normal"/>
    </style:style>
    <style:style style:name="T159" style:family="text">
      <style:text-properties fo:font-size="16pt" fo:font-style="normal" fo:font-weight="normal" officeooo:rsid="0017dfb8" style:font-size-asian="16pt" style:font-style-asian="normal" style:font-weight-asian="normal" style:font-size-complex="16pt" style:font-style-complex="normal" style:font-weight-complex="normal"/>
    </style:style>
    <style:style style:name="T160" style:family="text">
      <style:text-properties fo:font-size="16pt" fo:font-style="normal" fo:font-weight="normal" officeooo:rsid="001626ce" style:font-size-asian="16pt" style:font-style-asian="normal" style:font-weight-asian="normal" style:font-size-complex="16pt" style:font-style-complex="normal" style:font-weight-complex="normal"/>
    </style:style>
    <style:style style:name="T161" style:family="text">
      <style:text-properties fo:font-size="16pt" fo:font-weight="normal" officeooo:rsid="00432b57" style:font-size-asian="16pt" style:font-weight-asian="normal" style:font-size-complex="16pt" style:font-weight-complex="normal"/>
    </style:style>
    <style:style style:name="T162" style:family="text">
      <style:text-properties fo:font-size="16pt" fo:font-weight="normal" officeooo:rsid="00442511" style:font-size-asian="16pt" style:font-weight-asian="normal" style:font-size-complex="16pt" style:font-weight-complex="normal"/>
    </style:style>
    <style:style style:name="T163" style:family="text">
      <style:text-properties fo:font-size="16pt" fo:font-weight="normal" officeooo:rsid="001c773d" style:font-size-asian="16pt" style:font-weight-asian="normal" style:font-size-complex="16pt" style:font-weight-complex="normal"/>
    </style:style>
    <style:style style:name="T164" style:family="text">
      <style:text-properties fo:font-size="16pt" fo:font-weight="normal" officeooo:rsid="001611ca" style:font-size-asian="16pt" style:font-weight-asian="normal" style:font-size-complex="16pt" style:font-weight-complex="normal"/>
    </style:style>
    <style:style style:name="T165" style:family="text">
      <style:text-properties fo:font-size="16pt" fo:font-weight="normal" officeooo:rsid="001d7e7d" style:font-size-asian="16pt" style:font-weight-asian="normal" style:font-size-complex="16pt" style:font-weight-complex="normal"/>
    </style:style>
    <style:style style:name="T166" style:family="text">
      <style:text-properties fo:font-size="16pt" fo:font-weight="normal" officeooo:rsid="001cf94b" style:font-size-asian="16pt" style:font-weight-asian="normal" style:font-size-complex="16pt" style:font-weight-complex="normal"/>
    </style:style>
    <style:style style:name="T167" style:family="text">
      <style:text-properties fo:font-size="16pt" fo:font-weight="normal" officeooo:rsid="001d24eb" style:font-size-asian="16pt" style:font-weight-asian="normal" style:font-size-complex="16pt" style:font-weight-complex="normal"/>
    </style:style>
    <style:style style:name="T168" style:family="text">
      <style:text-properties fo:font-size="16pt" fo:font-weight="normal" officeooo:rsid="0017dfb8" style:font-size-asian="16pt" style:font-weight-asian="normal" style:font-size-complex="16pt" style:font-weight-complex="normal"/>
    </style:style>
    <style:style style:name="T169" style:family="text">
      <style:text-properties fo:font-size="16pt" fo:font-weight="normal" officeooo:rsid="001626ce" style:font-size-asian="16pt" style:font-weight-asian="normal" style:font-size-complex="16pt" style:font-weight-complex="normal"/>
    </style:style>
    <style:style style:name="T170" style:family="text">
      <style:text-properties fo:font-size="16pt" officeooo:rsid="00432b57" style:font-size-asian="16pt" style:font-size-complex="16pt"/>
    </style:style>
    <style:style style:name="T171" style:family="text">
      <style:text-properties fo:font-size="16pt" officeooo:rsid="00442511" style:font-size-asian="16pt" style:font-size-complex="16pt"/>
    </style:style>
    <style:style style:name="T172" style:family="text">
      <style:text-properties fo:font-size="16pt" officeooo:rsid="001c773d" style:font-size-asian="16pt" style:font-size-complex="16pt"/>
    </style:style>
    <style:style style:name="T173" style:family="text">
      <style:text-properties fo:font-size="16pt" officeooo:rsid="001611ca" style:font-size-asian="16pt" style:font-size-complex="16pt"/>
    </style:style>
    <style:style style:name="T174" style:family="text">
      <style:text-properties fo:font-size="16pt" officeooo:rsid="001d7e7d" style:font-size-asian="16pt" style:font-size-complex="16pt"/>
    </style:style>
    <style:style style:name="T175" style:family="text">
      <style:text-properties fo:font-size="16pt" officeooo:rsid="001cf94b" style:font-size-asian="16pt" style:font-size-complex="16pt"/>
    </style:style>
    <style:style style:name="T176" style:family="text">
      <style:text-properties fo:font-size="16pt" officeooo:rsid="001d24eb" style:font-size-asian="16pt" style:font-size-complex="16pt"/>
    </style:style>
    <style:style style:name="T177" style:family="text">
      <style:text-properties fo:font-size="16pt" officeooo:rsid="0017dfb8" style:font-size-asian="16pt" style:font-size-complex="16pt"/>
    </style:style>
    <style:style style:name="T178" style:family="text">
      <style:text-properties fo:font-size="16pt" officeooo:rsid="001626ce" style:font-size-asian="16pt" style:font-size-complex="16pt"/>
    </style:style>
    <style:style style:name="T179" style:family="text">
      <style:text-properties officeooo:rsid="004e6156"/>
    </style:style>
    <style:style style:name="T180" style:family="text">
      <style:text-properties officeooo:rsid="005351c9"/>
    </style:style>
    <style:style style:name="T181" style:family="text">
      <style:text-properties officeooo:rsid="004fb091"/>
    </style:style>
    <style:style style:name="T182" style:family="text">
      <style:text-properties officeooo:rsid="0050c9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Okraan</text:p>
      <text:p text:style-name="P1"/>
      <text:p text:style-name="P18">So you wan to Learn Okraan? Let’s begin with verbs and pronouns, then nouns, then possesiv pronouns in this chapter. </text:p>
      <text:p text:style-name="P18"/>
      <text:p text:style-name="P19">Sounds:</text:p>
      <text:p text:style-name="P19">ø = short ‘o’ </text:p>
      <text:p text:style-name="P23"><text:span text:style-name="T127">o = </text:span><text:span text:style-name="T76">o</text:span></text:p>
      <text:p text:style-name="P137"><text:span text:style-name="T94">ö = </text:span><text:span text:style-name="T77">o</text:span></text:p>
      <text:p text:style-name="P23"><text:span text:style-name="T127">ü = </text:span><text:span text:style-name="T76">u</text:span></text:p>
      <text:p text:style-name="P22"><text:span text:style-name="T126">e = </text:span><text:span text:style-name="T76">i</text:span></text:p>
      <text:p text:style-name="P22"><text:span text:style-name="T126">ë = </text:span><text:span text:style-name="T76">ɛ</text:span></text:p>
      <text:p text:style-name="P22"><text:span text:style-name="T126">é = </text:span><text:span text:style-name="T76">ɛ</text:span><text:span text:style-name="T126"> (height of word)</text:span></text:p>
      <text:p text:style-name="P22"><text:span text:style-name="T126">è = </text:span><text:span text:style-name="T76">ɛ</text:span><text:span text:style-name="T126"> (word falloff)</text:span></text:p>
      <text:p text:style-name="P20">ê = i (height of word)</text:p>
      <text:p text:style-name="P20"><text:span text:style-name="T74">j = y</text:span>uh</text:p>
      <text:p text:style-name="P21">ÿ = g</text:p>
      <text:p text:style-name="P21">y = yuh</text:p>
      <text:p text:style-name="P13"/>
      <text:p text:style-name="P24">1<text:span text:style-name="T1">st</text:span> Verbs <text:s text:c="5"/><text:span text:style-name="T5">-</text:span>ø<text:span text:style-name="T5">m </text:span><text:span text:style-name="T12">verbs</text:span></text:p>
      <text:p text:style-name="P26"><text:span text:style-name="T13">kersügø, </text:span><text:span text:style-name="T14">kursigi, </text:span><text:span text:style-name="T13">kersügøm (1)</text:span></text:p>
      <text:p text:style-name="P28">I kill</text:p>
      <text:p text:style-name="P12"/>
      <text:p text:style-name="P11"><text:span text:style-name="T13">nüd</text:span><text:span text:style-name="T37">ø</text:span><text:span text:style-name="T13">, nüvidi, </text:span><text:span text:style-name="T15">n</text:span><text:span text:style-name="T13">üd</text:span><text:span text:style-name="T37">ø</text:span><text:span text:style-name="T36">m (1)</text:span></text:p>
      <text:p text:style-name="P135">I speak</text:p>
      <text:p text:style-name="P135"/>
      <text:p text:style-name="P136">passevø, petevi, passevøm (1)</text:p>
      <text:p text:style-name="P136">I walk</text:p>
      <text:p text:style-name="P67"/>
      <text:p text:style-name="P150">maturakø, makati, maturakøm (1)</text:p>
      <text:p text:style-name="P151">I eat</text:p>
      <text:p text:style-name="P151"/>
      <text:p text:style-name="P149">pokirascø, porati, pokirascøm (1)</text:p>
      <text:p text:style-name="P152">I carry</text:p>
      <text:p text:style-name="P152"/>
      <text:p text:style-name="P153">amokirø, maki, amokirøm (1)</text:p>
      <text:p text:style-name="P153">I like/love</text:p>
      <text:p text:style-name="P67"/>
      <text:p text:style-name="P80">We will write verbs in their 4 principal parts:</text:p>
      <text:p text:style-name="P27"><text:span text:style-name="T16">Present, </text:span><text:span text:style-name="T17">P</text:span><text:span text:style-name="T16">luperfect/</text:span><text:span text:style-name="T28">Future</text:span><text:span text:style-name="T16">, </text:span><text:span text:style-name="T17">I</text:span><text:span text:style-name="T16">nfinitive (conjug. Number)</text:span></text:p>
      <text:p text:style-name="P29"/>
      <text:p text:style-name="P33"><text:soft-page-break/><text:span text:style-name="T16">The imperfect </text:span><text:span text:style-name="T28">and perfect</text:span><text:span text:style-name="T16"> tenses do not need to be listed as </text:span><text:span text:style-name="T28">they </text:span><text:span text:style-name="T16">are regular, non stem-changing tenses.</text:span></text:p>
      <text:p text:style-name="P67"/>
      <text:p text:style-name="P33"><text:span text:style-name="T16">To form the present tense for all 1</text:span><text:span text:style-name="T2">st</text:span><text:span text:style-name="T16"> conjugation verbs, you drop the -øm and replace I with one of he endings for each person. The endings for all 1</text:span><text:span text:style-name="T2">st</text:span><text:span text:style-name="T16"> conjugation verbs are as follows:</text:span></text:p>
      <text:p text:style-name="P67"/>
      <text:p text:style-name="P33">-ø</text:p>
      <text:p text:style-name="P33">-ül</text:p>
      <text:p text:style-name="P33">-ahl</text:p>
      <text:p text:style-name="P34">-ølar</text:p>
      <text:p text:style-name="P34">-über</text:p>
      <text:p text:style-name="P33">-hüol</text:p>
      <text:p text:style-name="P33"/>
      <text:p text:style-name="P67">I speak: nüd<text:span text:style-name="T73">ø</text:span> </text:p>
      <text:p text:style-name="P67">You (pl) speak: nüd<text:span text:style-name="T73">über</text:span></text:p>
      <text:p text:style-name="P67"/>
      <text:p text:style-name="P68">BUT this would be incorrect, as you must always have the pronoun in okraan.</text:p>
      <text:p text:style-name="P68"/>
      <text:p text:style-name="P36"><text:span text:style-name="T124">I: </text:span>Sö</text:p>
      <text:p text:style-name="P39"><text:span text:style-name="T124">You: </text:span>Sü</text:p>
      <text:p text:style-name="P39"><text:span text:style-name="T124">He/she: </text:span>Sah</text:p>
      <text:p text:style-name="P47">It: ï</text:p>
      <text:p text:style-name="P37"><text:span text:style-name="T124">We: </text:span>Söch</text:p>
      <text:p text:style-name="P37"><text:span text:style-name="T124">You PL: </text:span>Süch</text:p>
      <text:p text:style-name="P10"><text:span text:style-name="T46">They: </text:span><text:span text:style-name="T44">Sač</text:span><text:span text:style-name="T45">u</text:span></text:p>
      <text:p text:style-name="P70"/>
      <text:p text:style-name="P70">So they speak would be:</text:p>
      <text:p text:style-name="P70"/>
      <text:p text:style-name="P155"><text:span text:style-name="T38">Sač</text:span><text:span text:style-name="T40">u</text:span><text:span text:style-name="T38"> nüdhüol</text:span></text:p>
      <text:p text:style-name="P70"/>
      <text:p text:style-name="P104">The verb to be is irregular, Söbrom</text:p>
      <text:p text:style-name="P104"/>
      <text:p text:style-name="P48">Söbraču</text:p>
      <text:p text:style-name="P48">Sübira</text:p>
      <text:p text:style-name="P48">Ba</text:p>
      <text:p text:style-name="P48">Sàkàn</text:p>
      <text:p text:style-name="P48">Birún</text:p>
      <text:p text:style-name="P48">Baƚúmen</text:p>
      <text:p text:style-name="P37"/>
      <text:p text:style-name="P2"><text:span text:style-name="T12">1</text:span><text:span text:style-name="T4">st</text:span><text:span text:style-name="T12"> Declension Nouns</text:span></text:p>
      <text:p text:style-name="P145"><text:span text:style-name="T38">Now lets go onto 1</text:span><text:span text:style-name="T3">st</text:span><text:span text:style-name="T38"> declension nouns.</text:span></text:p>
      <text:p text:style-name="P81"/>
      <text:p text:style-name="P99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44">Mantutur</text:p>
          </table:table-cell>
          <table:table-cell table:style-name="Table1.A1" office:value-type="string">
            <text:p text:style-name="P144">Mountain</text:p>
          </table:table-cell>
        </table:table-row>
        <table:table-row table:style-name="Table1.1">
          <table:table-cell table:style-name="Table1.A1" office:value-type="string">
            <text:p text:style-name="P144">Krâssemur</text:p>
          </table:table-cell>
          <table:table-cell table:style-name="Table1.A1" office:value-type="string">
            <text:p text:style-name="P144">Grass</text:p>
          </table:table-cell>
        </table:table-row>
        <table:table-row table:style-name="Table1.1">
          <table:table-cell table:style-name="Table1.A1" office:value-type="string">
            <text:p text:style-name="P144">Jaiur</text:p>
          </table:table-cell>
          <table:table-cell table:style-name="Table1.A1" office:value-type="string">
            <text:p text:style-name="P144">Jaiur</text:p>
          </table:table-cell>
        </table:table-row>
        <table:table-row table:style-name="Table1.1">
          <table:table-cell table:style-name="Table1.A1" office:value-type="string">
            <text:p text:style-name="P144">gïrrur</text:p>
          </table:table-cell>
          <table:table-cell table:style-name="Table1.A1" office:value-type="string">
            <text:p text:style-name="P144">Girl</text:p>
          </table:table-cell>
        </table:table-row>
        <table:table-row table:style-name="Table1.1">
          <table:table-cell table:style-name="Table1.A1" office:value-type="string">
            <text:p text:style-name="P144">bùgotur</text:p>
          </table:table-cell>
          <table:table-cell table:style-name="Table1.A1" office:value-type="string">
            <text:p text:style-name="P144">Boy</text:p>
          </table:table-cell>
        </table:table-row>
        <table:table-row table:style-name="Table1.1">
          <table:table-cell table:style-name="Table1.A1" office:value-type="string">
            <text:p text:style-name="P144">Mattenur</text:p>
          </table:table-cell>
          <table:table-cell table:style-name="Table1.A1" office:value-type="string">
            <text:p text:style-name="P144">Man</text:p>
          </table:table-cell>
        </table:table-row>
        <table:table-row table:style-name="Table1.1">
          <table:table-cell table:style-name="Table1.A1" office:value-type="string">
            <text:p text:style-name="P144">Púxèhlur</text:p>
          </table:table-cell>
          <table:table-cell table:style-name="Table1.A1" office:value-type="string">
            <text:p text:style-name="P144">Friend</text:p>
          </table:table-cell>
        </table:table-row>
        <table:table-row table:style-name="Table1.1">
          <table:table-cell table:style-name="Table1.A1" office:value-type="string">
            <text:p text:style-name="P144">Cölhmâsur</text:p>
          </table:table-cell>
          <table:table-cell table:style-name="Table1.A1" office:value-type="string">
            <text:p text:style-name="P144">Christmas</text:p>
          </table:table-cell>
        </table:table-row>
        <table:table-row table:style-name="Table1.9">
          <table:table-cell table:style-name="Table1.A1" office:value-type="string">
            <text:p text:style-name="P144">Xälogtur</text:p>
          </table:table-cell>
          <table:table-cell table:style-name="Table1.A1" office:value-type="string">
            <text:p text:style-name="P144">Tree</text:p>
          </table:table-cell>
        </table:table-row>
        <table:table-row table:style-name="Table1.9">
          <table:table-cell table:style-name="Table1.A1" office:value-type="string">
            <text:p text:style-name="P144">Gnëmmiur</text:p>
          </table:table-cell>
          <table:table-cell table:style-name="Table1.A1" office:value-type="string">
            <text:p text:style-name="P144">Picture</text:p>
          </table:table-cell>
        </table:table-row>
        <table:table-row table:style-name="Table1.9">
          <table:table-cell table:style-name="Table1.A1" office:value-type="string">
            <text:p text:style-name="P144">phïnoùsur</text:p>
          </table:table-cell>
          <table:table-cell table:style-name="Table1.A1" office:value-type="string">
            <text:p text:style-name="P144">snow</text:p>
          </table:table-cell>
        </table:table-row>
        <table:table-row table:style-name="Table1.9">
          <table:table-cell table:style-name="Table1.A1" office:value-type="string">
            <text:p text:style-name="P144">wàlur</text:p>
          </table:table-cell>
          <table:table-cell table:style-name="Table1.A1" office:value-type="string">
            <text:p text:style-name="P144">water</text:p>
          </table:table-cell>
        </table:table-row>
        <table:table-row table:style-name="Table1.9">
          <table:table-cell table:style-name="Table1.A1" office:value-type="string">
            <text:p text:style-name="P144">Tëgiumur</text:p>
          </table:table-cell>
          <table:table-cell table:style-name="Table1.A1" office:value-type="string">
            <text:p text:style-name="P144">plant</text:p>
          </table:table-cell>
        </table:table-row>
        <table:table-row table:style-name="Table1.9">
          <table:table-cell table:style-name="Table1.A1" office:value-type="string">
            <text:p text:style-name="P144">čimànur</text:p>
          </table:table-cell>
          <table:table-cell table:style-name="Table1.A1" office:value-type="string">
            <text:p text:style-name="P144">chimney</text:p>
          </table:table-cell>
        </table:table-row>
        <table:table-row table:style-name="Table1.9">
          <table:table-cell table:style-name="Table1.A1" office:value-type="string">
            <text:p text:style-name="P144">rhôtevÿur</text:p>
          </table:table-cell>
          <table:table-cell table:style-name="Table1.A1" office:value-type="string">
            <text:p text:style-name="P144">road</text:p>
          </table:table-cell>
        </table:table-row>
        <table:table-row table:style-name="Table1.9">
          <table:table-cell table:style-name="Table1.A1" office:value-type="string">
            <text:p text:style-name="P144">kùslåmbur</text:p>
          </table:table-cell>
          <table:table-cell table:style-name="Table1.A1" office:value-type="string">
            <text:p text:style-name="P144">table</text:p>
          </table:table-cell>
        </table:table-row>
        <table:table-row table:style-name="Table1.9">
          <table:table-cell table:style-name="Table1.A1" office:value-type="string">
            <text:p text:style-name="P144">fëgoricur</text:p>
          </table:table-cell>
          <table:table-cell table:style-name="Table1.A1" office:value-type="string">
            <text:p text:style-name="P144">farm</text:p>
          </table:table-cell>
        </table:table-row>
        <table:table-row table:style-name="Table1.9">
          <table:table-cell table:style-name="Table1.A1" office:value-type="string">
            <text:p text:style-name="P144">algöshìnur</text:p>
          </table:table-cell>
          <table:table-cell table:style-name="Table1.A1" office:value-type="string">
            <text:p text:style-name="P144">farmer</text:p>
          </table:table-cell>
        </table:table-row>
      </table:table>
      <text:p text:style-name="P100"/>
      <text:p text:style-name="P100"/>
      <text:p text:style-name="P15"><text:s text:c="2"/>Söbraču u algöshìnur ï sö amokirø salö fëgoricìn, mabû salö púxèhlÿ gïrrur amokirahl uñ mantutìn. Da xälogtor efiti <text:span text:style-name="T131">nè </text:span>amokirull å da púxèhlå <text:span text:style-name="T131">š sah efiti kersugull å da. </text:span><text:span text:style-name="T82">S</text:span><text:span text:style-name="T74">ö </text:span><text:span text:style-name="T82">kallë kinùxit</text:span><text:span text:style-name="T104">a</text:span><text:span text:style-name="T82"> passeva, </text:span><text:span text:style-name="T103">üwa </text:span><text:span text:style-name="T131">kú</text:span><text:span text:style-name="T132"> gïrrur kersüg</text:span><text:span text:style-name="T104">os</text:span><text:span text:style-name="T132"> </text:span><text:span text:style-name="T74">č</text:span><text:span text:style-name="T79">u </text:span><text:span text:style-name="T104">bùgot</text:span><text:span text:style-name="T78">ìn </text:span><text:span text:style-name="T103">ï </text:span><text:span text:style-name="T104">u mantutur kallë nüdos </text:span><text:span text:style-name="T74">č</text:span><text:span text:style-name="T79">u</text:span><text:span text:style-name="T104"> supüsid </text:span><text:span text:style-name="T78">Krâssemìn. </text:span></text:p>
      <text:p text:style-name="P15"><text:span text:style-name="T131"><text:s text:c="2"/></text:span><text:span text:style-name="T135">K</text:span><text:span text:style-name="T131">ú tëgiumur du kùslåmb</text:span><text:span text:style-name="T124">ȅ. </text:span><text:span text:style-name="T133">U bùgotur </text:span><text:span text:style-name="T79">ÿoa </text:span><text:span text:style-name="T133">púxèhl</text:span><text:span text:style-name="T79">ÿ</text:span><text:span text:style-name="T133">. </text:span><text:span text:style-name="T134">Sa</text:span><text:span text:style-name="T74">č</text:span><text:span text:style-name="T78">u </text:span><text:span text:style-name="T134">kaiti nüdehü </text:span><text:span text:style-name="T110">å</text:span><text:span text:style-name="T114">ñ </text:span><text:span text:style-name="T112">p</text:span><text:span text:style-name="T115">úxèhl</text:span><text:span text:style-name="T110">å.</text:span></text:p>
      <text:p text:style-name="P14"/>
      <text:p text:style-name="P16">I am a farmer and I like my farm, but my friend’s girl loves mountains. Her tree is not loved by her friend or she is killed by her. <text:span text:style-name="T131">I was walking quickly, when a girl killed the boy and the mountain was speaking to the softest grass.</text:span></text:p>
      <text:p text:style-name="P17"><text:s/>A plant on the table. The boy of the friend. They were spoken by the friends.</text:p>
      <text:p text:style-name="P102"/>
      <text:p text:style-name="P81">To change the cases of the nouns, you change the article and change the ending.</text:p>
      <text:p text:style-name="P81">Endings:</text:p>
      <text:p text:style-name="P81"/>
      <text:p text:style-name="P145"><text:span text:style-name="T38">Nom </text:span><text:span text:style-name="T43">(subj.)</text:span><text:span text:style-name="T38">: </text:span><text:span text:style-name="T60">no change</text:span></text:p>
      <text:p text:style-name="P146"><text:span text:style-name="T55">Voc </text:span><text:span text:style-name="T59">(spoken to)</text:span><text:span text:style-name="T55">: -</text:span><text:span text:style-name="T56">ö</text:span></text:p>
      <text:p text:style-name="P146"><text:span text:style-name="T56">A</text:span><text:span text:style-name="T55">cc </text:span><text:span text:style-name="T59">(obj.)</text:span><text:span text:style-name="T55">: -ìn</text:span></text:p>
      <text:p text:style-name="P146"><text:span text:style-name="T55">Gen</text:span><text:span text:style-name="T59"> (of)</text:span><text:span text:style-name="T55">: -</text:span><text:span text:style-name="T57">ÿ</text:span></text:p>
      <text:p text:style-name="P81">Dat<text:span text:style-name="T119">ive, Ablative</text:span> <text:span text:style-name="T119">(to, for, by, with, from)</text:span>: -å</text:p>
      <text:p text:style-name="P95"><text:span text:style-name="T124">Superlocive</text:span> (in, into, on, <text:span text:style-name="T124">aca.voice</text:span>): -<text:span text:style-name="T124">ȅ</text:span></text:p>
      <text:p text:style-name="P81"/>
      <text:p text:style-name="P146"><text:soft-page-break/><text:span text:style-name="T55">Now, here I will show you the</text:span><text:span text:style-name="T57"> singular and plural definitive articles in every case. They are the same for each declension of nouns.</text:span></text:p>
      <text:p text:style-name="P86"/>
      <text:p text:style-name="P148"><text:span text:style-name="T57">C</text:span><text:span text:style-name="T55">ASE: SING / PLU</text:span></text:p>
      <text:p text:style-name="P147"><text:span text:style-name="T55">Nom: u / </text:span><text:span text:style-name="T58">uñ</text:span></text:p>
      <text:p text:style-name="P143"><text:span text:style-name="T41">Voc: ó / <text:s/>ó</text:span><text:span text:style-name="T42">ñ</text:span></text:p>
      <text:p text:style-name="P143"><text:span text:style-name="T41">Acc: </text:span><text:span text:style-name="T39">č</text:span><text:span text:style-name="T42">u / </text:span><text:span text:style-name="T39">č</text:span><text:span text:style-name="T42">uñ</text:span></text:p>
      <text:p text:style-name="P87">Gen: ÿoa / <text:s/>ÿoañ</text:p>
      <text:p text:style-name="P87">Dat/abl: mo / moñ</text:p>
      <text:p text:style-name="P96">Superlocive: du / duñ</text:p>
      <text:p text:style-name="P96"/>
      <text:p text:style-name="P101">Here are the indefinite articles:</text:p>
      <text:p text:style-name="P101"/>
      <text:p text:style-name="P101">Nom: kú / kús</text:p>
      <text:p text:style-name="P101">Voc: äli / älis</text:p>
      <text:p text:style-name="P101">Acc: čii / čiis</text:p>
      <text:p text:style-name="P103">Gen: ÿi / ÿiis</text:p>
      <text:p text:style-name="P103">Dat/abl: mi / miis</text:p>
      <text:p text:style-name="P103">Supl: di / diis</text:p>
      <text:p text:style-name="P103"/>
      <text:p text:style-name="P103">A plant on the table:</text:p>
      <text:p text:style-name="P103">kú tëgiumur du kùslåmb<text:span text:style-name="T124">ȅ.</text:span></text:p>
      <text:p text:style-name="P87"/>
      <text:p text:style-name="P87">Now we know how to do this, we cane make our first proper sentence!</text:p>
      <text:p text:style-name="P87">I kill the man:</text:p>
      <text:p text:style-name="P38"><text:span text:style-name="T16">Sö </text:span><text:span text:style-name="T18">kersügø </text:span><text:span text:style-name="T16">č</text:span><text:span text:style-name="T18">u </text:span><text:span text:style-name="T19">matten</text:span><text:span text:style-name="T20">ìn.</text:span></text:p>
      <text:p text:style-name="P82"/>
      <text:p text:style-name="P40"><text:span text:style-name="T16">We</text:span><text:span text:style-name="T20"> </text:span><text:span text:style-name="T16">walk to the mountain:</text:span></text:p>
      <text:p text:style-name="P38"><text:span text:style-name="T16">Söch </text:span><text:span text:style-name="T19">passevølar mo mantut</text:span><text:span text:style-name="T20">å.</text:span></text:p>
      <text:p text:style-name="P82"/>
      <text:p text:style-name="P40"><text:span text:style-name="T16">The </text:span><text:span text:style-name="T20">B</text:span><text:span text:style-name="T16">oy!</text:span></text:p>
      <text:p text:style-name="P40"><text:span text:style-name="T21">Ó </text:span><text:span text:style-name="T16">bùgot</text:span><text:span text:style-name="T22">ö!</text:span></text:p>
      <text:p text:style-name="P73"/>
      <text:p text:style-name="P42"><text:span text:style-name="T22">T</text:span><text:span text:style-name="T16">he boy of the friend:</text:span></text:p>
      <text:p text:style-name="P42"><text:span text:style-name="T16">U bùgotur </text:span><text:span text:style-name="T18">ÿoa </text:span><text:span text:style-name="T16">púxèhl</text:span><text:span text:style-name="T18">ÿ</text:span><text:span text:style-name="T16">.</text:span></text:p>
      <text:p text:style-name="P85"/>
      <text:p text:style-name="P41"><text:span text:style-name="T22">H</text:span><text:span text:style-name="T16">ere are some conjun</text:span><text:span text:style-name="T23">c</text:span><text:span text:style-name="T16">tions:</text:span></text:p>
      <text:p text:style-name="P88"/>
      <text:p text:style-name="P88">üwa = when</text:p>
      <text:p text:style-name="P88">mabû = but</text:p>
      <text:p text:style-name="P88">ï = and</text:p>
      <text:p text:style-name="P88">nè = not</text:p>
      <text:p text:style-name="P89">š = or</text:p>
      <text:p text:style-name="P102">more than <text:span text:style-name="T136">= šelïn d</text:span></text:p>
      <text:p text:style-name="P89"/>
      <text:p text:style-name="P3"><text:soft-page-break/>Chapter <text:span text:style-name="T80">3</text:span> – the perfect and imperfect tense</text:p>
      <text:p text:style-name="P3"/>
      <text:p text:style-name="P106">Forming the past tense is simple enough – all you do is change the endings of the verb with as follows:</text:p>
      <text:p text:style-name="P73"/>
      <text:p text:style-name="P40">-a</text:p>
      <text:p text:style-name="P40">-utim</text:p>
      <text:p text:style-name="P40">-os</text:p>
      <text:p text:style-name="P40">-aiu</text:p>
      <text:p text:style-name="P40">-ustr</text:p>
      <text:p text:style-name="P40">-osu<text:span text:style-name="T74">č</text:span></text:p>
      <text:p text:style-name="P40"/>
      <text:p text:style-name="P74">There’s nothing else to it.</text:p>
      <text:p text:style-name="P75">The boy walked <text:span text:style-name="T119">on</text:span> the grass:</text:p>
      <text:p text:style-name="P75">U bùgotur passevos mo k<text:span text:style-name="T78">râssemå.</text:span></text:p>
      <text:p text:style-name="P74"/>
      <text:p text:style-name="P74">Now let’s look at the <text:span text:style-name="T80">imperfect.</text:span></text:p>
      <text:p text:style-name="P75">Just before the verb, you put <text:span text:style-name="T62">kallë </text:span>or <text:span text:style-name="T62">kallâ</text:span> – depending if it is 1<text:span text:style-name="T1">st</text:span> - 2<text:span text:style-name="T1">nd</text:span> - 3<text:span text:style-name="T1">rd</text:span> person singular or plural. You keep the endings from the perfect and voila!</text:p>
      <text:p text:style-name="P75"/>
      <text:p text:style-name="P75">Sö kallë nüda mo gïrr<text:span text:style-name="T78">å</text:span><text:span text:style-name="T79">. </text:span></text:p>
      <text:p text:style-name="P75">I was speaking to the girl.</text:p>
      <text:p text:style-name="P75"/>
      <text:p text:style-name="P71">Süch <text:span text:style-name="T81">kallâ kersügüber </text:span>č<text:span text:style-name="T79">u </text:span><text:span text:style-name="T81">k</text:span><text:span text:style-name="T78">râssemìn.</text:span></text:p>
      <text:p text:style-name="P75">You (pl) were killing the grass.</text:p>
      <text:p text:style-name="P75"/>
      <text:p text:style-name="P4">Chapter 4 – Adjectives and Adverbs</text:p>
      <text:p text:style-name="P107"/>
      <text:p text:style-name="P107">Luckily for us, adjectives are very, very simple and have no self-endings. </text:p>
      <text:p text:style-name="P107">Here are a few adjectives:</text:p>
      <text:p text:style-name="P107"/>
      <text:p text:style-name="P107"/>
      <text:p text:style-name="P107">p<text:span text:style-name="T125">ü</text:span>sid = soft</text:p>
      <text:p text:style-name="P107">harg<text:span text:style-name="T125">ô</text:span>mm = hard</text:p>
      <text:p text:style-name="P107">phex<text:span text:style-name="T125">ø</text:span>lib = flexible</text:p>
      <text:p text:style-name="P107">tma<text:span text:style-name="T125">ù</text:span>l <text:s/>= delicious</text:p>
      <text:p text:style-name="P107">b<text:span text:style-name="T125">ä</text:span>ulit = beautiful/handsome</text:p>
      <text:p text:style-name="P107">z<text:span text:style-name="T125">é</text:span>v<text:span text:style-name="T125">é</text:span>n<text:span text:style-name="T125">é</text:span>te = thin</text:p>
      <text:p text:style-name="P107">xor<text:span text:style-name="T125">è</text:span>v<text:span text:style-name="T125">è</text:span>t<text:span text:style-name="T125">è</text:span>ne = fat</text:p>
      <text:p text:style-name="P107">k<text:span text:style-name="T125">î</text:span>nkaus = clean</text:p>
      <text:p text:style-name="P115">eg<text:span text:style-name="T125">û</text:span>ria = large</text:p>
      <text:p text:style-name="P115">d<text:span text:style-name="T125">é</text:span>vuria = small</text:p>
      <text:p text:style-name="P107"/>
      <text:p text:style-name="P108"><text:soft-page-break/>Adjectives are simple – you just put them before the word you are describing and you add <text:span text:style-name="T85">ìn </text:span><text:span text:style-name="T83">to the end if the noun is in the accusative. Other than that, you do not change them.</text:span></text:p>
      <text:p text:style-name="P108"/>
      <text:p text:style-name="P110">For the comparative <text:span text:style-name="T146">or very</text:span> use prefix -a. <text:span text:style-name="T147">If you then want to say than xyz you put däu after.</text:span></text:p>
      <text:p text:style-name="P110">For the superlative use prefix -su</text:p>
      <text:p text:style-name="P110"/>
      <text:p text:style-name="P108">He walked to the soft<text:span text:style-name="T104">er</text:span> grass:</text:p>
      <text:p text:style-name="P108">Sah passevos mo <text:span text:style-name="T104">a</text:span>püsid <text:span text:style-name="T85">Krâssemå.</text:span></text:p>
      <text:p text:style-name="P111"/>
      <text:p text:style-name="P107">And a few adverbs:</text:p>
      <text:p text:style-name="P107"/>
      <text:p text:style-name="P107"><text:span text:style-name="T75">Ƚ</text:span>amjan = slowly</text:p>
      <text:p text:style-name="P107">Kin<text:span text:style-name="T82">ù</text:span>xitan = quickly/withe energy</text:p>
      <text:p text:style-name="P107">l<text:span text:style-name="T103">à</text:span>valean = calmly</text:p>
      <text:p text:style-name="P107">s<text:span text:style-name="T103">ü</text:span>mman = immediately</text:p>
      <text:p text:style-name="P107"/>
      <text:p text:style-name="P108">Adverbs are ever so slightly more complex. You drop the -an and put the same ending as the verb on it.</text:p>
      <text:p text:style-name="P108">I was walking quickly, <text:span text:style-name="T104">when the girl killed the boy and the mountain was speaking to the softest grass</text:span></text:p>
      <text:p text:style-name="P108"/>
      <text:p text:style-name="P109">S<text:span text:style-name="T84">ö </text:span><text:span text:style-name="T83">kallë kinùxit</text:span><text:span text:style-name="T89">a</text:span><text:span text:style-name="T83"> passeva, </text:span><text:span text:style-name="T86">üwa </text:span><text:span text:style-name="T87">u gïrrur kersüg</text:span><text:span text:style-name="T89">os</text:span><text:span text:style-name="T87"> </text:span><text:span text:style-name="T84">č</text:span><text:span text:style-name="T88">u </text:span><text:span text:style-name="T89">bùgot</text:span><text:span text:style-name="T85">ìn </text:span><text:span text:style-name="T86">ï </text:span><text:span text:style-name="T89">u mantutur kallë nüdos </text:span><text:span text:style-name="T84">č</text:span><text:span text:style-name="T88">u</text:span><text:span text:style-name="T89"> supüsid </text:span><text:span text:style-name="T85">Krâssemìn. </text:span></text:p>
      <text:p text:style-name="P83"/>
      <text:p text:style-name="P8"><text:span text:style-name="T85">Chapter 5 – </text:span><text:span text:style-name="T95">Pluperfect </text:span><text:span text:style-name="T96">+ Future</text:span><text:span text:style-name="T95"> Tense</text:span></text:p>
      <text:p text:style-name="P126">The Pluperfect is one of the trickier tenses. You use the irregular form of the verb with a unique set of endings.</text:p>
      <text:p text:style-name="P126"/>
      <text:p text:style-name="P126">Let’s translae <text:span text:style-name="T5">I had been eating.</text:span></text:p>
      <text:p text:style-name="P126"/>
      <text:p text:style-name="P126">Step 1: Get the irregular pluperfect form of <text:span text:style-name="T62">maturakø</text:span> – <text:span text:style-name="T62">makati</text:span>.</text:p>
      <text:p text:style-name="P126"/>
      <text:p text:style-name="P126">Step 2: drop the ‘I’ and change the endings to as follows:</text:p>
      <text:p text:style-name="P53">-uš</text:p>
      <text:p text:style-name="P53">-ƚa</text:p>
      <text:p text:style-name="P53">-ugo</text:p>
      <text:p text:style-name="P53">-ušin</text:p>
      <text:p text:style-name="P53">-ƚibr</text:p>
      <text:p text:style-name="P53">-ugoin</text:p>
      <text:p text:style-name="P53"/>
      <text:p text:style-name="P126">Step 3: Put the prefix <text:span text:style-name="T62">ta- </text:span>before the verb.</text:p>
      <text:p text:style-name="P126"/>
      <text:p text:style-name="P126"><text:soft-page-break/>I had been eating: sö tamakatuš.</text:p>
      <text:p text:style-name="P126"/>
      <text:p text:style-name="P129">Now let’s look at the future. The future also derives off he irregular form of the verb.</text:p>
      <text:p text:style-name="P129">Let’s translate, ‘I will eat’.</text:p>
      <text:p text:style-name="P129"/>
      <text:p text:style-name="P127">Step 1: Get the irregular pluperfect form of <text:span text:style-name="T62">maturakø</text:span> – <text:span text:style-name="T62">makati</text:span>.</text:p>
      <text:p text:style-name="P127"/>
      <text:p text:style-name="P127">Step 2: drop the ‘I’ and change the endings to as follows:</text:p>
      <text:p text:style-name="P54">-<text:span text:style-name="T128">al</text:span>š</text:p>
      <text:p text:style-name="P54">-<text:span text:style-name="T128">a</text:span>ƚ<text:span text:style-name="T128">ë</text:span></text:p>
      <text:p text:style-name="P54">-o<text:span text:style-name="T128">si</text:span></text:p>
      <text:p text:style-name="P54">-<text:span text:style-name="T128">al</text:span>šin</text:p>
      <text:p text:style-name="P54">-<text:span text:style-name="T128">aƚebr</text:span></text:p>
      <text:p text:style-name="P54">-<text:span text:style-name="T128">osioin</text:span></text:p>
      <text:p text:style-name="P54"/>
      <text:p text:style-name="P127">Step 3: Put the prefix <text:span text:style-name="T69">uy</text:span><text:span text:style-name="T62">- </text:span>before the verb.</text:p>
      <text:p text:style-name="P127"/>
      <text:p text:style-name="P128">I <text:span text:style-name="T128">will eat</text:span>: sö <text:span text:style-name="T128">uy</text:span>makat<text:span text:style-name="T128">al</text:span>š.</text:p>
      <text:p text:style-name="P83"/>
      <text:p text:style-name="P5">Chapter <text:span text:style-name="T130">6</text:span> – Passive Voice</text:p>
      <text:p text:style-name="P112">The passive voice is quite a complex thing in Okraan. Let’s do it step-by-step.</text:p>
      <text:p text:style-name="P112">Let’s say: I <text:span text:style-name="T105">am</text:span> killed by the boy.</text:p>
      <text:p text:style-name="P112"/>
      <text:p text:style-name="P113">To make the verb from I kill to I am killed, we change the ending to a whole new set.</text:p>
      <text:p text:style-name="P35">-<text:span text:style-name="T105">g</text:span></text:p>
      <text:p text:style-name="P35">-<text:span text:style-name="T105">e</text:span>ü</text:p>
      <text:p text:style-name="P35">-<text:span text:style-name="T105">ull</text:span></text:p>
      <text:p text:style-name="P35">-<text:span text:style-name="T105">takø</text:span></text:p>
      <text:p text:style-name="P35">-<text:span text:style-name="T105">vili</text:span></text:p>
      <text:p text:style-name="P35">-<text:span text:style-name="T105">e</text:span>hü</text:p>
      <text:p text:style-name="P35"><text:s/><text:span text:style-name="T24">So instead of kersüg</text:span><text:span text:style-name="T105">ø </text:span><text:span text:style-name="T24">(I kill), it’s kersüg</text:span><text:span text:style-name="T105">g </text:span><text:span text:style-name="T24">(I am killed).</text:span></text:p>
      <text:p text:style-name="P91"/>
      <text:p text:style-name="P43"><text:span text:style-name="T16">But this isn’t all. We then have an auxiliary word which changes depending on the </text:span><text:span text:style-name="T25">pronoun/subject </text:span><text:span text:style-name="T29">and tense</text:span><text:span text:style-name="T25">. It goes like this:</text:span></text:p>
      <text:p text:style-name="P78"/>
      <text:p text:style-name="P44"><text:span text:style-name="T16">S</text:span><text:span text:style-name="T26">ö </text:span><text:span text:style-name="T27">e</text:span>fal</text:p>
      <text:p text:style-name="P69">Sü <text:span text:style-name="T64">efu</text:span><text:span text:style-name="T65">t</text:span></text:p>
      <text:p text:style-name="P69">Sah <text:span text:style-name="T64">efiti</text:span></text:p>
      <text:p text:style-name="P72">Söch <text:span text:style-name="T64">kaal</text:span></text:p>
      <text:p text:style-name="P72">Süch <text:span text:style-name="T64">kau</text:span><text:span text:style-name="T65">t</text:span></text:p>
      <text:p text:style-name="P44"><text:span text:style-name="T22">Sač</text:span><text:span text:style-name="T20">u </text:span>kaiti</text:p>
      <text:p text:style-name="P44"/>
      <text:p text:style-name="P76">So I am killed is <text:span text:style-name="T62">S</text:span><text:span text:style-name="T63">ö </text:span><text:span text:style-name="T62">efal kersügg </text:span>.</text:p>
      <text:p text:style-name="P76"/>
      <text:p text:style-name="P76"><text:soft-page-break/>But what about <text:span text:style-name="T5">by the boy</text:span>? This is called the agent, and it is very simple.</text:p>
      <text:p text:style-name="P76">All you do is change <text:span text:style-name="T107">u bùgotur </text:span><text:span text:style-name="T106">to </text:span><text:span text:style-name="T108">å </text:span><text:span text:style-name="T107">bùgot</text:span><text:span text:style-name="T108">å</text:span><text:span text:style-name="T110">. </text:span><text:span text:style-name="T106">Here, wha</text:span><text:span text:style-name="T113">t</text:span><text:span text:style-name="T106"> is happening is </text:span><text:span text:style-name="T113">t</text:span><text:span text:style-name="T106">he Nominative definitive article is being changed to </text:span><text:span text:style-name="T11">å</text:span><text:span text:style-name="T110"> </text:span><text:span text:style-name="T106">instead of </text:span><text:span text:style-name="T10">mo</text:span><text:span text:style-name="T110">, </text:span><text:span text:style-name="T106">and </text:span><text:span text:style-name="T10">bùgotur </text:span><text:span text:style-name="T106">is made into the Ablative.</text:span></text:p>
      <text:p text:style-name="P76"/>
      <text:p text:style-name="P76">I am killed by the boy:</text:p>
      <text:p text:style-name="P76"><text:span text:style-name="T62">S</text:span><text:span text:style-name="T63">ö </text:span><text:span text:style-name="T62">efal kersügg </text:span><text:span text:style-name="T108">å </text:span><text:span text:style-name="T107">bùgot</text:span><text:span text:style-name="T108">å.</text:span></text:p>
      <text:p text:style-name="P138"/>
      <text:p text:style-name="P76"><text:span text:style-name="T110">T</text:span><text:span text:style-name="T106">hey are spoken by the friends:</text:span></text:p>
      <text:p text:style-name="P76">Sa<text:span text:style-name="T74">č</text:span><text:span text:style-name="T78">u </text:span>kaiti nüdehü <text:span text:style-name="T110">å</text:span><text:span text:style-name="T114">ñ </text:span><text:span text:style-name="T106">p</text:span><text:span text:style-name="T115">úxèhl</text:span><text:span text:style-name="T110">å.</text:span></text:p>
      <text:p text:style-name="P139"/>
      <text:p text:style-name="P79"><text:span text:style-name="T110">T</text:span><text:span text:style-name="T106">o make the perfect/imperfect tense, you add the endings of the perfect/imperfect to the auxiliary, and in he imperfect you add the extra word as usual.</text:span></text:p>
      <text:p text:style-name="P140"/>
      <text:p text:style-name="P79"><text:span text:style-name="T110">I</text:span><text:span text:style-name="T106">mperfec</text:span><text:span text:style-name="T111">t</text:span><text:span text:style-name="T106">:</text:span></text:p>
      <text:p text:style-name="P79"><text:span text:style-name="T110">I </text:span><text:span text:style-name="T106">was being killed by the boy:</text:span></text:p>
      <text:p text:style-name="P77">S<text:span text:style-name="T81">ö </text:span><text:span text:style-name="T65">kallë</text:span><text:span text:style-name="T117"> </text:span>efal<text:span text:style-name="T65">a</text:span> kersügg <text:span text:style-name="T110">å </text:span><text:span text:style-name="T106">bùgot</text:span><text:span text:style-name="T110">å.</text:span></text:p>
      <text:p text:style-name="P140"/>
      <text:p text:style-name="P97"><text:span text:style-name="T110">P</text:span><text:span text:style-name="T106">erfect: I was killed by the boy: </text:span><text:span text:style-name="T112">S</text:span><text:span text:style-name="T109">ö </text:span><text:span text:style-name="T112">efal</text:span><text:span text:style-name="T107">a</text:span><text:span text:style-name="T112"> kersügg </text:span><text:span text:style-name="T110">å </text:span><text:span text:style-name="T112">bùgot</text:span><text:span text:style-name="T110">å.</text:span></text:p>
      <text:p text:style-name="P141"/>
      <text:p text:style-name="P142">To form the pluperfect/future, you put ta-/uy- before the auxiliary, and add the respective verb endings to the auxiliary.</text:p>
      <text:p text:style-name="P98"/>
      <text:p text:style-name="P98">Pluperfect: I had been killed by the boy. <text:span text:style-name="T112">S</text:span><text:span text:style-name="T109">ö </text:span><text:span text:style-name="T107">ta</text:span><text:span text:style-name="T112">efal</text:span><text:span text:style-name="T107">uš</text:span><text:span text:style-name="T112"> kersügg </text:span><text:span text:style-name="T110">å </text:span><text:span text:style-name="T112">bùgot</text:span><text:span text:style-name="T110">å.</text:span></text:p>
      <text:p text:style-name="P98"><text:span text:style-name="T110">F</text:span><text:span text:style-name="T106">uture: I will be killed by the boy: </text:span><text:span text:style-name="T112">S</text:span><text:span text:style-name="T109">ö </text:span><text:span text:style-name="T107">uy</text:span><text:span text:style-name="T112">efal</text:span><text:span text:style-name="T107">alš</text:span><text:span text:style-name="T112"> kersügg </text:span><text:span text:style-name="T110">å </text:span><text:span text:style-name="T112">bùgot</text:span><text:span text:style-name="T110">å.</text:span></text:p>
      <text:p text:style-name="P141"/>
      <text:p text:style-name="P154"><text:span text:style-name="T81">Chapter </text:span><text:span text:style-name="T130">7</text:span><text:span text:style-name="T81"> – </text:span><text:span text:style-name="T118">Reflexives, </text:span><text:span text:style-name="T120">Object Pronouns, </text:span><text:span text:style-name="T118">Demonstratives </text:span><text:span text:style-name="T120">and </text:span><text:span text:style-name="T118">Possessives</text:span></text:p>
      <text:p text:style-name="P9"/>
      <text:p text:style-name="P50">Possessives:</text:p>
      <text:p text:style-name="P116">my: salö</text:p>
      <text:p text:style-name="P116">your: salü</text:p>
      <text:p text:style-name="P116">his/hers/its: sàlàhu</text:p>
      <text:p text:style-name="P116">ours: salöch</text:p>
      <text:p text:style-name="P116">yours (pl): salüch</text:p>
      <text:p text:style-name="P116">theirs: sà<text:span text:style-name="T120">č</text:span>àhüch</text:p>
      <text:p text:style-name="P116"/>
      <text:p text:style-name="P51">Object pronouns:</text:p>
      <text:p text:style-name="P117">me: dö</text:p>
      <text:p text:style-name="P117">you: dü</text:p>
      <text:p text:style-name="P117">him/her/it: da</text:p>
      <text:p text:style-name="P117">us: döch</text:p>
      <text:p text:style-name="P117">you: düch</text:p>
      <text:p text:style-name="P117">them: <text:span text:style-name="T120">daču</text:span></text:p>
      <text:p text:style-name="P84"><text:soft-page-break/></text:p>
      <text:p text:style-name="P50">Reflexives:</text:p>
      <text:p text:style-name="P49"><text:span text:style-name="T16">Myself: </text:span><text:span text:style-name="T34">â </text:span><text:span text:style-name="T32">sö</text:span></text:p>
      <text:p text:style-name="P49"><text:span text:style-name="T32">Yourself: </text:span><text:span text:style-name="T34">â </text:span><text:span text:style-name="T32">sü</text:span></text:p>
      <text:p text:style-name="P49"><text:span text:style-name="T32">Himslef/herself/itself: </text:span><text:span text:style-name="T34">â </text:span><text:span text:style-name="T32">sah</text:span></text:p>
      <text:p text:style-name="P50"><text:span text:style-name="T32">Ourselves: </text:span><text:span text:style-name="T34">â </text:span><text:span text:style-name="T32">söch</text:span></text:p>
      <text:p text:style-name="P50"><text:span text:style-name="T32">Yourselves: </text:span><text:span text:style-name="T34">â </text:span><text:span text:style-name="T32">süch</text:span></text:p>
      <text:p text:style-name="P50"><text:span text:style-name="T32">Themselves: </text:span><text:span text:style-name="T34">â </text:span><text:span text:style-name="T32">sa</text:span><text:span text:style-name="T33">č</text:span><text:span text:style-name="T32">u</text:span></text:p>
      <text:p text:style-name="P92"/>
      <text:p text:style-name="P45">Demonsrative:</text:p>
      <text:p text:style-name="P114">This: <text:span text:style-name="T84">č</text:span><text:span text:style-name="T83">uor</text:span></text:p>
      <text:p text:style-name="P114"><text:span text:style-name="T83">These: </text:span><text:span text:style-name="T84">č</text:span><text:span text:style-name="T83">aris</text:span></text:p>
      <text:p text:style-name="P114"><text:span text:style-name="T83">That: u</text:span><text:span text:style-name="T84">č</text:span><text:span text:style-name="T83">et</text:span></text:p>
      <text:p text:style-name="P114"><text:span text:style-name="T83">Those: u</text:span><text:span text:style-name="T84">č</text:span><text:span text:style-name="T83">eris</text:span></text:p>
      <text:p text:style-name="P114"/>
      <text:p text:style-name="P46"/>
      <text:p text:style-name="P93"/>
      <text:p text:style-name="P94">That boy ate himself and my grass.</text:p>
      <text:p text:style-name="P94">Učet bùgotur maturakos â sah ï salö Krâssemìn.</text:p>
      <text:p text:style-name="P94"/>
      <text:p text:style-name="P94">This boy was carrying the mountain, but the woman wasn’t carried by the girls.</text:p>
      <text:p text:style-name="P94"/>
      <text:p text:style-name="P52"><text:span text:style-name="T32">Čuor bùgotur kullë pokirascos ču mantutìn, mabû u jaiur efitios </text:span><text:span text:style-name="T35">nè </text:span><text:span text:style-name="T32">pokirascul</text:span><text:span text:style-name="T35">l åñ gïrrå.</text:span></text:p>
      <text:p text:style-name="P90"/>
      <text:p text:style-name="P6"><text:span text:style-name="T90">Chapter </text:span><text:span text:style-name="T97">8</text:span><text:span text:style-name="T90"> – </text:span><text:span text:style-name="T91">Accusactive Voice</text:span></text:p>
      <text:p text:style-name="P118">This voice is unique to Okraan.</text:p>
      <text:p text:style-name="P118"/>
      <text:p text:style-name="P118">Active: ‘I eat the grass’</text:p>
      <text:p text:style-name="P118">Passive: ‘The grass is eaten by me’</text:p>
      <text:p text:style-name="P118">Accusactive: ‘it is I who eats the grass’</text:p>
      <text:p text:style-name="P118"/>
      <text:p text:style-name="P125">Active: sö maturakø ču krâssemìn.</text:p>
      <text:p text:style-name="P125">Passive: u krâssemur efiti maturakg å dö.</text:p>
      <text:p text:style-name="P125">Accusactive: ï ba dö vú maturakø du krâssem<text:span text:style-name="T122">ȅ.</text:span></text:p>
      <text:p text:style-name="P125"/>
      <text:p text:style-name="P119">To form it we use <text:span text:style-name="T66">ï ba</text:span><text:span text:style-name="T62"> </text:span><text:span text:style-name="T5">(it is) </text:span>followed by an <text:span text:style-name="T62">object pronoun</text:span>. Then we use <text:span text:style-name="T62">vú </text:span><text:span text:style-name="T121">before the verb, like the </text:span><text:span text:style-name="T6">who</text:span><text:span text:style-name="T121">, and then the object </text:span><text:span text:style-name="T122">in the </text:span><text:span text:style-name="T68">superlocive</text:span><text:span text:style-name="T121">. </text:span><text:span text:style-name="T122">So:</text:span></text:p>
      <text:p text:style-name="P119"/>
      <text:p text:style-name="P120">ï ba dö vú kersügø du gïrrȅ. <text:span text:style-name="T5">It is I who kills the girl.</text:span></text:p>
      <text:p text:style-name="P120">Ï ba daču vú tševočirhüol du mattenȅ. <text:span text:style-name="T5">It is them who hand over the man.</text:span></text:p>
      <text:p text:style-name="P30"/>
      <text:p text:style-name="P120">To make it <text:span text:style-name="T123">perfect, all you do is change the endings of the verb as normal.</text:span></text:p>
      <text:p text:style-name="P124"><text:soft-page-break/>For the imperfect, you keep the endings of the perfect as usual but change <text:span text:style-name="T62">vú </text:span>depending on the number.</text:p>
      <text:p text:style-name="P124"/>
      <text:p text:style-name="P124">Singular: vúna</text:p>
      <text:p text:style-name="P124">Plural: vúnis</text:p>
      <text:p text:style-name="P124"/>
      <text:p text:style-name="P124">Perfect:</text:p>
      <text:p text:style-name="P121">ï ba dö vú kersüg<text:span text:style-name="T67">a</text:span> du gïrrȅ. <text:span text:style-name="T5">It </text:span><text:span text:style-name="T7">was</text:span><text:span text:style-name="T5"> I who kill</text:span><text:span text:style-name="T7">ed</text:span><text:span text:style-name="T5"> the girl.</text:span></text:p>
      <text:p text:style-name="P31"/>
      <text:p text:style-name="P124">Imperfect:</text:p>
      <text:p text:style-name="P121">ï ba dö vú<text:span text:style-name="T67">na</text:span> kersüg<text:span text:style-name="T67">a</text:span> du gïrrȅ. <text:span text:style-name="T5">It </text:span><text:span text:style-name="T7">was</text:span><text:span text:style-name="T5"> I who </text:span><text:span text:style-name="T7">was </text:span><text:span text:style-name="T5">kill</text:span><text:span text:style-name="T7">ing</text:span><text:span text:style-name="T5"> the girl.</text:span></text:p>
      <text:p text:style-name="P123">Ï ba daču vú<text:span text:style-name="T67">nis</text:span> tševočir<text:span text:style-name="T67">ehü</text:span> du mattenȅ. <text:span text:style-name="T5">It </text:span><text:span text:style-name="T7">was</text:span><text:span text:style-name="T5"> them who </text:span><text:span text:style-name="T7">were </text:span><text:span text:style-name="T5">hand</text:span><text:span text:style-name="T7">ing</text:span><text:span text:style-name="T5"> over the man.</text:span></text:p>
      <text:p text:style-name="P31"/>
      <text:p text:style-name="P130">For the pluperfect/future tenses, you put the respective prefix and verb endings on the verb as usual.</text:p>
      <text:p text:style-name="P122"><text:span text:style-name="T129">PP: </text:span>ï ba dö vú <text:span text:style-name="T70">ta</text:span>kersüg<text:span text:style-name="T70">uš</text:span> du gïrrȅ. <text:span text:style-name="T5">It </text:span><text:span text:style-name="T7">was</text:span><text:span text:style-name="T5"> I who </text:span><text:span text:style-name="T8">had killed</text:span><text:span text:style-name="T5"> the girl.</text:span></text:p>
      <text:p text:style-name="P130">FT: <text:span text:style-name="T122">ï ba dö vú </text:span><text:span text:style-name="T62">uy</text:span><text:span text:style-name="T122">kersüg</text:span><text:span text:style-name="T62">alš</text:span><text:span text:style-name="T122"> du gïrrȅ. </text:span><text:span text:style-name="T9">It </text:span><text:span text:style-name="T7">w</text:span><text:span text:style-name="T5">ill be</text:span><text:span text:style-name="T9"> I who kill</text:span><text:span text:style-name="T5">s</text:span><text:span text:style-name="T9"> the girl.</text:span></text:p>
      <text:p text:style-name="P90"/>
      <text:p text:style-name="P105"/>
      <text:p text:style-name="P7"><text:span text:style-name="T90">Chapter </text:span><text:span text:style-name="T92">9</text:span><text:span text:style-name="T90"> – </text:span><text:span text:style-name="T92">Eviden</text:span><text:span text:style-name="T93">t</text:span><text:span text:style-name="T92">iality,</text:span><text:span text:style-name="T98"> Question</text:span><text:span text:style-name="T99">s, Interjections</text:span></text:p>
      <text:p text:style-name="P134">These are the 4 types of Okraanian evidentiality and how they work.</text:p>
      <text:p text:style-name="P134"/>
      <text:p text:style-name="P56">Definitive: You had the boy.</text:p>
      <text:p text:style-name="P133">You do not change the Okraan.</text:p>
      <text:p text:style-name="P56">Attributive: So, you (must’ve) had the boy.</text:p>
      <text:p text:style-name="P133">You put he prefix tëvo- before the verb</text:p>
      <text:p text:style-name="P56">Reportive: Apparently, you had the boy.</text:p>
      <text:p text:style-name="P133">You put the prefix käo- before the verb</text:p>
      <text:p text:style-name="P56">Comparative: As if/like <text:s/>you had the boy.</text:p>
      <text:p text:style-name="P133">You start the sentence with Küv</text:p>
      <text:p text:style-name="P32"/>
      <text:p text:style-name="P131">For a question, you just stae the normal sentence with <text:span text:style-name="T62">múšun, </text:span><text:span text:style-name="T137">the the first verb in the </text:span><text:span text:style-name="T71">infinitive</text:span><text:span text:style-name="T137">, </text:span><text:span text:style-name="T139">and the subject/subj.pronoun after the verb.</text:span></text:p>
      <text:p text:style-name="P133"/>
      <text:p text:style-name="P133"><text:span text:style-name="T141">11</text:span> Types of Question Auxiliaries <text:span text:style-name="T145">(take off šun o get the word non-quesion)</text:span>:</text:p>
      <text:p text:style-name="P56">General (asks validity of verb): m<text:span text:style-name="T140">úšun</text:span></text:p>
      <text:p text:style-name="P56">Positive (expects that the verb is valid): limen</text:p>
      <text:p text:style-name="P56">Negaive (expecs that the verb is invalid): nemen</text:p>
      <text:p text:style-name="P56">Locative (where…?): ta<text:span text:style-name="T140">šun</text:span></text:p>
      <text:p text:style-name="P56">Persative (who…?): vo<text:span text:style-name="T140">šun</text:span></text:p>
      <text:p text:style-name="P56">Objective (what…?): ve<text:span text:style-name="T140">šun</text:span></text:p>
      <text:p text:style-name="P56">Chronitive (when…?): ka<text:span text:style-name="T140">šun</text:span></text:p>
      <text:p text:style-name="P57">Methoditive (how…?): qergu<text:span text:style-name="T140">šun</text:span></text:p>
      <text:p text:style-name="P57">Reasetive (why…?): dew<text:span text:style-name="T140">šun</text:span></text:p>
      <text:p text:style-name="P57"><text:soft-page-break/>Chaditive (due to what…?): le<text:span text:style-name="T140">šun</text:span></text:p>
      <text:p text:style-name="P57">Selective (which…?): jak<text:span text:style-name="T140">šun</text:span></text:p>
      <text:p text:style-name="P57"/>
      <text:p text:style-name="P132">For a queston which prefers yes, it’s <text:span text:style-name="T138">lìmen, and for no its nèmen.</text:span></text:p>
      <text:p text:style-name="P55"/>
      <text:p text:style-name="P132"><text:span text:style-name="T62">Múšun îkoùremëøm </text:span><text:span text:style-name="T72">sü </text:span><text:span text:style-name="T62">ču bùgotìn? </text:span><text:span text:style-name="T5">Do you have the boy?</text:span></text:p>
      <text:p text:style-name="P55"/>
      <text:p text:style-name="P57">Pyuran – river, to swim (pyurøm)</text:p>
      <text:p text:style-name="P57">Pyaran – floodplain</text:p>
      <text:p text:style-name="P57">Peran – fish, river animal</text:p>
      <text:p text:style-name="P57">Purean – river delta</text:p>
      <text:p text:style-name="P57">Pyrusan – river of life</text:p>
      <text:p text:style-name="P57"/>
      <text:p text:style-name="P59">kroarø</text:p>
      <text:p text:style-name="P57">I was swimming in the river, when I saw a bee. It was producing honey for i<text:span text:style-name="T142">t</text:span>s family. But suddenly, a boat drove past me, and I couldn’t see the bee anymore.</text:p>
      <text:p text:style-name="P60">But that is how the river of life works, and you will be consumed by it.</text:p>
      <text:p text:style-name="P58"/>
      <text:p text:style-name="P158"><text:span text:style-name="T48">Sö kallë pyura </text:span><text:span text:style-name="T49">qaƚ pyuravȅj</text:span><text:span text:style-name="T48">, </text:span><text:span text:style-name="T52">üwa</text:span><text:span text:style-name="T49"> sö vir</text:span><text:span text:style-name="T48">a </text:span><text:span text:style-name="T49">čerr myleìjn. </text:span><text:span text:style-name="T50">Ï kallë kroara myleìjn ikra </text:span><text:span text:style-name="T143">sàlàhu </text:span><text:span text:style-name="T50">famuløqu. Mabu šeibor, u weikenur duriva dikha dö, ï sö </text:span><text:span text:style-name="T51">ne pirauva virøm čerr myleìjn eru po. </text:span><text:span text:style-name="T53">Mabu učet ba qergu î pyrusan fawinahl, ï süch uykautaƚebr maturakvili å da. </text:span><text:span text:style-name="T152">Söbraču u algöshìnur ï sö amokirø salö fëgoricìn, mabû salö púxèhlÿ gïrrur amokirahl uñ mantutìn. Da xälogtor efiti </text:span><text:span text:style-name="T153">nè </text:span><text:span text:style-name="T152">amokirull å da púxèhlå </text:span><text:span text:style-name="T153">š sah efiti kersugull å da. </text:span><text:span text:style-name="T154">S</text:span><text:span text:style-name="T155">ö </text:span><text:span text:style-name="T154">kallë kinùxit</text:span><text:span text:style-name="T156">a</text:span><text:span text:style-name="T154"> passeva, </text:span><text:span text:style-name="T157">üwa </text:span><text:span text:style-name="T153">kú</text:span><text:span text:style-name="T158"> gïrrur kersüg</text:span><text:span text:style-name="T156">os</text:span><text:span text:style-name="T158"> </text:span><text:span text:style-name="T155">č</text:span><text:span text:style-name="T159">u </text:span><text:span text:style-name="T156">bùgot</text:span><text:span text:style-name="T160">ìn </text:span><text:span text:style-name="T157">ï </text:span><text:span text:style-name="T156">u mantutur kallë nüdos </text:span><text:span text:style-name="T155">č</text:span><text:span text:style-name="T159">u</text:span><text:span text:style-name="T156"> supüsid </text:span><text:span text:style-name="T160">Krâssemìn. </text:span></text:p>
      <text:p text:style-name="P160"><text:span text:style-name="T131"><text:s text:c="2"/></text:span><text:span text:style-name="T135">K</text:span><text:span text:style-name="T131">ú tëgiumur du kùslåmb</text:span><text:span text:style-name="T124">ȅ. </text:span><text:span text:style-name="T133">U bùgotur </text:span><text:span text:style-name="T79">ÿoa </text:span><text:span text:style-name="T133">púxèhl</text:span><text:span text:style-name="T79">ÿ</text:span><text:span text:style-name="T133">. </text:span><text:span text:style-name="T134">Sa</text:span><text:span text:style-name="T74">č</text:span><text:span text:style-name="T78">u </text:span><text:span text:style-name="T134">kaiti nüdehü </text:span><text:span text:style-name="T110">å</text:span><text:span text:style-name="T114">ñ </text:span><text:span text:style-name="T112">p</text:span><text:span text:style-name="T115">úxèhl</text:span><text:span text:style-name="T110">å.</text:span></text:p>
      <text:p text:style-name="P160"/>
      <text:p text:style-name="P160">I am a farmer and I like my farm, but my friend’s girl loves mountains. Her tree is not loved by her friend or she is killed by her. <text:span text:style-name="T131">I was walking quickly, when a girl killed the boy and the mountain was speaking to the softest grass.</text:span></text:p>
      <text:p text:style-name="P159"><text:span text:style-name="T53"><text:s/>A plant on the table. The boy of the friend. They were spoken by the friends.</text:span></text:p>
      <text:p text:style-name="P61"/>
      <text:p text:style-name="P156"><text:span text:style-name="T51">T</text:span><text:span text:style-name="T47">o swim = pyurøm</text:span></text:p>
      <text:p text:style-name="P62">to see = virøm</text:p>
      <text:p text:style-name="P62">famulan = family</text:p>
      <text:p text:style-name="P62">šeibor = suddenly</text:p>
      <text:p text:style-name="P62">boat = weikenur</text:p>
      <text:p text:style-name="P62">to drive = durivøm</text:p>
      <text:p text:style-name="P62">dikha dö = past me</text:p>
      <text:p text:style-name="P156"><text:span text:style-name="T47">pirauvøm = to be able to + </text:span><text:span text:style-name="T61">inf.</text:span></text:p>
      <text:p text:style-name="P62"><text:soft-page-break/>Eru po = anymore</text:p>
      <text:p text:style-name="P60">to work, function = fawinøm</text:p>
      <text:p text:style-name="P62"/>
      <text:p text:style-name="P63">Our cocoa tree is very disgusting. Their cocoa trees are more beautiful than ours.</text:p>
      <text:p text:style-name="P63"/>
      <text:p text:style-name="P157"><text:span text:style-name="T47">Dalöch xajacan ba </text:span><text:span text:style-name="T54">adeguroaj. Dàčàhüch-îv xajacan ba abäulitaj däu salöch.</text:span></text:p>
      <text:p text:style-name="P63"/>
      <text:p text:style-name="P64">Spider = ägotikur</text:p>
      <text:p text:style-name="P64">to tell (a story) = nåterøm</text:p>
      <text:p text:style-name="P64">to regale = wēgurøm</text:p>
      <text:p text:style-name="P64">story = nåtošan</text:p>
      <text:p text:style-name="P64">wonder = velur</text:p>
      <text:p text:style-name="P64">containing/full of = pökir</text:p>
      <text:p text:style-name="P64">fun = åfulìmakitur</text:p>
      <text:p text:style-name="P64">fact = eiüvan</text:p>
      <text:p text:style-name="P64">too/also = eqùw</text:p>
      <text:p text:style-name="P64">because = ēnsor</text:p>
      <text:p text:style-name="P64">nosy/spylike = fàgušir</text:p>
      <text:p text:style-name="P64">to know = zjlačirøm</text:p>
      <text:p text:style-name="P64">everything = <text:span text:style-name="T148">sïsa-</text:span><text:span text:style-name="T149">ve</text:span></text:p>
      <text:p text:style-name="P65">all of = sheim, shöli (see the determiners)</text:p>
      <text:p text:style-name="P65">everybody = sïsa-<text:span text:style-name="T151">vo</text:span></text:p>
      <text:p text:style-name="P65">almost = åvušin</text:p>
      <text:p text:style-name="P65">hour = ohïoan</text:p>
      <text:p text:style-name="P66">about/of = ēlu</text:p>
      <text:p text:style-name="P65"/>
      <text:p text:style-name="P161"><text:tab/><text:span text:style-name="T16">Anansi, u ägotikur, alomvahl nåterøm ču nåtošìjn! Sah pirauvahl wēgurøm dü ikranea ohïoøqú ikranea nåtošøqú pökir velìn, </text:span><text:span text:style-name="T30">ju</text:span><text:span text:style-name="T16">v nåtoš</text:span><text:span text:style-name="T30">an pökir åfulìmakitur, ï juv nåtošan pökir eiüvìjn, eqùw. <text:s/>Ēnsor sah ba afàgušir, Anansi </text:span><text:span text:style-name="T31">zjlačirahl åvušin sïsa-ve ēlu åvušin sïsa-vo. </text:span><text:span text:style-name="T30">Åvušin. </text:span></text:p>
      <text:p text:style-name="P164"><text:span text:style-name="T141"><text:tab/>Sö kallë pyura </text:span><text:span text:style-name="T179">qaƚ pyuravȅj</text:span><text:span text:style-name="T141">, </text:span><text:span text:style-name="T180">üwa</text:span><text:span text:style-name="T179"> sö vir</text:span><text:span text:style-name="T141">a </text:span><text:span text:style-name="T179">čerr myleìjn. </text:span><text:span text:style-name="T181">Ï kallë kroara myleìjn ikra </text:span><text:span text:style-name="T144">sàlàhu </text:span><text:span text:style-name="T181">famuløqu. Mabu šeibor, u weikenur duriva dikha dö, ï sö </text:span><text:span text:style-name="T182">ne pirauva virøm čerr myleìjn eru po. </text:span><text:span text:style-name="T145">Mabu učet ba qergu î pyrusan fawinahl, ï süch uykautaƚebr maturakvili å da. </text:span><text:span text:style-name="T100">Söbraču u algöshìnur ï sö amokirø salö fëgoricìn, mabû salö púxèhlÿ gïrrur amokirahl uñ mantutìn. Da xälogtor efiti </text:span><text:span text:style-name="T101">nè </text:span><text:span text:style-name="T100">amokirull å da púxèhlå </text:span><text:span text:style-name="T101">š sah efiti kersugull å da. </text:span><text:span text:style-name="T102">S</text:span><text:span text:style-name="T84">ö </text:span><text:span text:style-name="T102">kallë kinùxit</text:span><text:span text:style-name="T89">a</text:span><text:span text:style-name="T102"> passeva, </text:span><text:span text:style-name="T86">üwa </text:span><text:span text:style-name="T101">kú</text:span><text:span text:style-name="T87"> gïrrur kersüg</text:span><text:span text:style-name="T89">os</text:span><text:span text:style-name="T87"> </text:span><text:span text:style-name="T84">č</text:span><text:span text:style-name="T88">u </text:span><text:span text:style-name="T89">bùgot</text:span><text:span text:style-name="T85">ìn </text:span><text:span text:style-name="T86">ï </text:span><text:span text:style-name="T89">u mantutur kallë nüdos </text:span><text:span text:style-name="T84">č</text:span><text:span text:style-name="T88">u</text:span><text:span text:style-name="T89"> supüsid </text:span><text:span text:style-name="T85">Krâssemìn. </text:span></text:p>
      <text:p text:style-name="P165"><text:span text:style-name="T135"><text:tab/>K</text:span><text:span text:style-name="T131">ú tëgiumur du kùslåmb</text:span><text:span text:style-name="T124">ȅ. </text:span><text:span text:style-name="T133">U bùgotur </text:span><text:span text:style-name="T79">ÿoa </text:span><text:span text:style-name="T133">púxèhl</text:span><text:span text:style-name="T79">ÿ</text:span><text:span text:style-name="T133">. </text:span><text:span text:style-name="T134">Sa</text:span><text:span text:style-name="T74">č</text:span><text:span text:style-name="T78">u </text:span><text:span text:style-name="T134">kaiti nüdehü </text:span><text:span text:style-name="T110">å</text:span><text:span text:style-name="T114">ñ </text:span><text:span text:style-name="T112">p</text:span><text:span text:style-name="T115">úxèhl</text:span><text:span text:style-name="T110">å.</text:span></text:p>
      <text:p text:style-name="P162"><text:span text:style-name="T110">Dew</text:span><text:span text:style-name="T116">šun </text:span></text:p>
      <text:p text:style-name="P163"><text:span text:style-name="T110"/></text:p>
      <text:p text:style-name="P64"/>
      <text:p text:style-name="P6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, 'Bitstream Charter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nionPro-Regular" svg:font-family="MinionPro-Regular" style:font-family-generic="roman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_5b_No_20_Paragraph_20_Style_5d_" style:display-name="[No Paragraph Style]" style:family="paragraph">
      <style:paragraph-properties fo:margin-top="0cm" fo:margin-bottom="0cm" style:contextual-spacing="false" fo:line-height="120%" fo:text-align="start" style:justify-single-word="false" fo:hyphenation-ladder-count="no-limit" style:vertical-align="middle" style:writing-mode="lr-tb"/>
      <style:text-properties fo:color="#000000" loext:opacity="100%" style:text-line-through-style="none" style:text-line-through-type="none" style:font-name="MinionPro-Regular" fo:font-family="MinionPro-Regular" style:font-family-generic="roman" style:font-pitch="variable" fo:font-size="12pt" fo:letter-spacing="normal" fo:language="en" fo:country="GB" fo:font-style="normal" style:text-underline-style="none" fo:font-weight="normal" style:font-size-asian="12pt" style:font-style-asian="normal" style:font-weight-asian="normal" style:text-emphasize="none" style:text-scale="100%" fo:hyphenate="true" fo:hyphenation-remain-char-count="2" fo:hyphenation-push-char-count="2" loext:hyphenation-no-caps="false"/>
    </style:style>
    <style:style style:name="_5b_Basic_20_Paragraph_5d_" style:display-name="[Basic Paragraph]" style:family="paragraph" style:parent-style-name="_5b_No_20_Paragraph_20_Style_5d_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Endnote" style:page-layout-name="Mpm3" draw:style-name="Mdp1"/>
    <style:master-page style:name="Envelope" style:page-layout-name="Mpm4" draw:style-name="Mdp1"/>
    <style:master-page style:name="First_20_Page" style:display-name="First Page" style:page-layout-name="Mpm5" draw:style-name="Mdp1" style:next-style-name="Standard"/>
    <style:master-page style:name="Footnote" style:page-layout-name="Mpm3" draw:style-name="Mdp1"/>
    <style:master-page style:name="HTML" style:page-layout-name="Mpm6" draw:style-name="Mdp1"/>
    <style:master-page style:name="Index" style:page-layout-name="Mpm5" draw:style-name="Mdp1"/>
    <style:master-page style:name="Right_20_Page" style:display-name="Right Page" style:page-layout-name="Mpm7" draw:style-name="Mdp1" style:next-style-name="Left_20_Page"/>
    <style:master-page style:name="Left_20_Page" style:display-name="Left Page" style:page-layout-name="Mpm8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18:03:00.295000000</meta:creation-date>
    <dc:date>2022-12-15T16:24:58.334000000</dc:date>
    <meta:editing-duration>P3DT5H33M23S</meta:editing-duration>
    <meta:editing-cycles>40</meta:editing-cycles>
    <meta:generator>LibreOffice/7.3.4.2$Windows_X86_64 LibreOffice_project/728fec16bd5f605073805c3c9e7c4212a0120dc5</meta:generator>
    <meta:document-statistic meta:table-count="1" meta:image-count="0" meta:object-count="0" meta:page-count="13" meta:paragraph-count="366" meta:word-count="2377" meta:character-count="12754" meta:non-whitespace-character-count="10693"/>
  </office:meta>
</office:document-meta>
</file>